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FFF2CC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2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2CC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2CC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000000"/>
      <style:text-properties fo:color="#FF0000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2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2C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F2C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FFF2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2pt solid #000000" style:vertical-align="middle" fo:background-color="#FFF2C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F2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2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2CC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fo:background-color="#FFF2CC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2C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2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fo:background-color="#000000"/>
      <style:text-properties fo:color="#FF0000"/>
    </style:style>
    <style:style style:name="ce26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F2CC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3.360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1633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6" table:number-rows-spanned="2" table:style-name="ce18">
            <text:p>5段階評価を4段階評価に変換する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8">
            <text:p>5段階評価を4段階評価に変換する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8">
            <text:p>10段階評価を4段階評価に変換する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8">
            <text:p>10段階評価を4段階評価に変換する</text:p>
          </table:table-cell>
          <table:covered-table-cell table:number-columns-repeated="5"/>
          <table:table-cell table:style-name="ce1"/>
          <table:table-cell office:value-type="string" table:number-columns-spanned="7" table:number-rows-spanned="2" table:style-name="ce18">
            <text:p>A+ ～F の成績を4段階評価にする（54行目で数値の調整が可能）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2" table:style-name="ce18">
            <text:p>A+ ～F の成績を4段階評価にする（54行目で数値の調整が可能）</text:p>
          </table:table-cell>
          <table:covered-table-cell table:number-columns-repeated="6"/>
          <table:table-cell table:style-name="ce1"/>
          <table:table-cell office:value-type="string" table:number-columns-spanned="5" table:number-rows-spanned="2" table:style-name="ce18">
            <text:p>5段階評価のGPA</text:p>
          </table:table-cell>
          <table:covered-table-cell table:number-columns-repeated="4"/>
          <table:table-cell table:style-name="ce1"/>
          <table:table-cell office:value-type="string" table:number-columns-spanned="6" table:number-rows-spanned="2" table:style-name="ce18">
            <text:p>4段階評価を5段階評価に変換する</text:p>
          </table:table-cell>
          <table:covered-table-cell table:number-columns-repeated="5"/>
          <table:table-cell table:number-columns-repeated="16327"/>
        </table:table-row>
        <table:table-row table:style-name="ro2">
          <table:table-cell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6"/>
          <table:table-cell table:style-name="ce1"/>
          <table:covered-table-cell/>
          <table:covered-table-cell table:number-columns-repeated="6"/>
          <table:table-cell table:style-name="ce1"/>
          <table:covered-table-cell/>
          <table:covered-table-cell table:number-columns-repeated="4"/>
          <table:table-cell table:style-name="ce1"/>
          <table:covered-table-cell/>
          <table:covered-table-cell table:number-columns-repeated="5"/>
          <table:table-cell table:number-columns-repeated="16327"/>
        </table:table-row>
        <table:table-row table:style-name="ro2">
          <table:table-cell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5段階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5段階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10段階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10段階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記号</text:p>
          </table:table-cell>
          <table:table-cell office:value-type="string" table:style-name="ce22">
            <text:p>変換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記号</text:p>
          </table:table-cell>
          <table:table-cell office:value-type="string" table:style-name="ce21">
            <text:p>変換</text:p>
          </table:table-cell>
          <table:table-cell office:value-type="string" table:style-name="ce5">
            <text:p>4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5段階</text:p>
          </table:table-cell>
          <table:table-cell table:style-name="ce5"/>
          <table:table-cell table:style-name="ce1"/>
          <table:table-cell table:style-name="ce4"/>
          <table:table-cell office:value-type="string" table:style-name="ce19">
            <text:p>教科</text:p>
          </table:table-cell>
          <table:table-cell office:value-type="string" table:style-name="ce3">
            <text:p>単位数</text:p>
          </table:table-cell>
          <table:table-cell office:value-type="string" table:style-name="ce3">
            <text:p>4段階</text:p>
          </table:table-cell>
          <table:table-cell office:value-type="string" table:style-name="ce5">
            <text:p>5段階</text:p>
          </table:table-cell>
          <table:table-cell table:style-name="ce5"/>
          <table:table-cell table:number-columns-repeated="16327"/>
        </table:table-row>
        <table:table-row table:style-name="ro2">
          <table:table-cell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5]*[.E5]*0.86/[.D5]" table:style-name="ce5">
            <text:p>4.3</text:p>
          </table:table-cell>
          <table:table-cell office:value-type="float" office:value="43" table:formula="of:=[.D5]*[.E5]*0.86" table:style-name="ce5">
            <text:p>43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5]*[.L5]*0.8/[.K5]" table:style-name="ce5">
            <text:p>4</text:p>
          </table:table-cell>
          <table:table-cell office:value-type="float" office:value="40" table:formula="of:=[.K5]*[.L5]*0.8" table:style-name="ce5">
            <text:p>40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5]*[.S5]*0.43/[.R5]" table:style-name="ce5">
            <text:p>4.3</text:p>
          </table:table-cell>
          <table:table-cell office:value-type="float" office:value="43" table:formula="of:=[.R5]*[.S5]*0.43" table:style-name="ce23">
            <text:p>43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5]*[.S5]*0.4/[.R5]" table:style-name="ce5">
            <text:p>4</text:p>
          </table:table-cell>
          <table:table-cell office:value-type="float" office:value="40" table:formula="of:=[.R5]*[.S5]*0.4" table:style-name="ce5">
            <text:p>40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5]; [.$AG$54:.$AH$67]; 2; FALSE)" table:style-name="ce3">
            <text:p>4.3</text:p>
          </table:table-cell>
          <table:table-cell office:value-type="float" office:value="4.3" table:formula="of:=[.AH5]" table:style-name="ce23">
            <text:p>4.3</text:p>
          </table:table-cell>
          <table:table-cell office:value-type="float" office:value="43" table:formula="of:=[.AF5]*[.AI5]" table:style-name="ce5">
            <text:p>43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5]; [.$AO$54:.$AP$67]; 2; FALSE)" table:style-name="ce24">
            <text:p>4</text:p>
          </table:table-cell>
          <table:table-cell office:value-type="float" office:value="4" table:formula="of:=[.AP5]" table:style-name="ce5">
            <text:p>4</text:p>
          </table:table-cell>
          <table:table-cell office:value-type="float" office:value="40" table:formula="of:=[.AN5]*[.AQ5]" table:style-name="ce5">
            <text:p>40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50" table:formula="of:=[.AV5]*[.AW5]" table:style-name="ce5">
            <text:p>50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3">
            <text:p>1年現代文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5]+1" table:style-name="ce5">
            <text:p>5</text:p>
          </table:table-cell>
          <table:table-cell office:value-type="float" office:value="50" table:formula="of:=[.BB5]*[.BD5]" table:style-name="ce5">
            <text:p>5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6]*[.E6]*0.86/[.D6]" table:style-name="ce5">
            <text:p>4.3</text:p>
          </table:table-cell>
          <table:table-cell office:value-type="float" office:value="43" table:formula="of:=[.D6]*[.E6]*0.86" table:style-name="ce5">
            <text:p>43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6]*[.L6]*0.8/[.K6]" table:style-name="ce5">
            <text:p>4</text:p>
          </table:table-cell>
          <table:table-cell office:value-type="float" office:value="40" table:formula="of:=[.K6]*[.L6]*0.8" table:style-name="ce5">
            <text:p>40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6]*[.S6]*0.43/[.R6]" table:style-name="ce5">
            <text:p>3.87</text:p>
          </table:table-cell>
          <table:table-cell office:value-type="float" office:value="38.700000000000003" table:formula="of:=[.R6]*[.S6]*0.43" table:style-name="ce23">
            <text:p>38.7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6]*[.S6]*0.4/[.R6]" table:style-name="ce5">
            <text:p>3.6</text:p>
          </table:table-cell>
          <table:table-cell office:value-type="float" office:value="36" table:formula="of:=[.R6]*[.S6]*0.4" table:style-name="ce5">
            <text:p>36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6]; [.$AG$54:.$AH$67]; 2; FALSE)" table:style-name="ce3">
            <text:p>4.2</text:p>
          </table:table-cell>
          <table:table-cell office:value-type="float" office:value="4.2" table:formula="of:=[.AH6]" table:style-name="ce23">
            <text:p>4.2</text:p>
          </table:table-cell>
          <table:table-cell office:value-type="float" office:value="42" table:formula="of:=[.AF6]*[.AI6]" table:style-name="ce5">
            <text:p>42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6]; [.$AO$54:.$AP$67]; 2; FALSE)" table:style-name="ce24">
            <text:p>3.9</text:p>
          </table:table-cell>
          <table:table-cell office:value-type="float" office:value="3.9" table:formula="of:=[.AP6]" table:style-name="ce5">
            <text:p>3.9</text:p>
          </table:table-cell>
          <table:table-cell office:value-type="float" office:value="39" table:formula="of:=[.AN6]*[.AQ6]" table:style-name="ce5">
            <text:p>39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50" table:formula="of:=[.AV6]*[.AW6]" table:style-name="ce5">
            <text:p>50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3">
            <text:p>2年現代文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6]+1" table:style-name="ce5">
            <text:p>4</text:p>
          </table:table-cell>
          <table:table-cell office:value-type="float" office:value="40" table:formula="of:=[.BB6]*[.BD6]" table:style-name="ce5">
            <text:p>4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7]*[.E7]*0.86/[.D7]" table:style-name="ce5">
            <text:p>3.44</text:p>
          </table:table-cell>
          <table:table-cell office:value-type="float" office:value="34.4" table:formula="of:=[.D7]*[.E7]*0.86" table:style-name="ce5">
            <text:p>34.4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7]*[.L7]*0.8/[.K7]" table:style-name="ce5">
            <text:p>3.2</text:p>
          </table:table-cell>
          <table:table-cell office:value-type="float" office:value="32" table:formula="of:=[.K7]*[.L7]*0.8" table:style-name="ce5">
            <text:p>32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7]*[.S7]*0.43/[.R7]" table:style-name="ce5">
            <text:p>3.44</text:p>
          </table:table-cell>
          <table:table-cell office:value-type="float" office:value="34.4" table:formula="of:=[.R7]*[.S7]*0.43" table:style-name="ce23">
            <text:p>34.4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7]*[.S7]*0.4/[.R7]" table:style-name="ce5">
            <text:p>3.2</text:p>
          </table:table-cell>
          <table:table-cell office:value-type="float" office:value="32" table:formula="of:=[.R7]*[.S7]*0.4" table:style-name="ce5">
            <text:p>32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7]; [.$AG$54:.$AH$67]; 2; FALSE)" table:style-name="ce3">
            <text:p>4</text:p>
          </table:table-cell>
          <table:table-cell office:value-type="float" office:value="4" table:formula="of:=[.AH7]" table:style-name="ce23">
            <text:p>4</text:p>
          </table:table-cell>
          <table:table-cell office:value-type="float" office:value="40" table:formula="of:=[.AF7]*[.AI7]" table:style-name="ce5">
            <text:p>40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7]; [.$AO$54:.$AP$67]; 2; FALSE)" table:style-name="ce24">
            <text:p>3.8</text:p>
          </table:table-cell>
          <table:table-cell office:value-type="float" office:value="3.8" table:formula="of:=[.AP7]" table:style-name="ce5">
            <text:p>3.8</text:p>
          </table:table-cell>
          <table:table-cell office:value-type="float" office:value="38" table:formula="of:=[.AN7]*[.AQ7]" table:style-name="ce5">
            <text:p>38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40" table:formula="of:=[.AV7]*[.AW7]" table:style-name="ce5">
            <text:p>40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3">
            <text:p>3年現代文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7]+1" table:style-name="ce5">
            <text:p>3</text:p>
          </table:table-cell>
          <table:table-cell office:value-type="float" office:value="30" table:formula="of:=[.BB7]*[.BD7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8]*[.E8]*0.86/[.D8]" table:style-name="ce5">
            <text:p>3.44</text:p>
          </table:table-cell>
          <table:table-cell office:value-type="float" office:value="17.2" table:formula="of:=[.D8]*[.E8]*0.86" table:style-name="ce5">
            <text:p>17.2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8]*[.L8]*0.8/[.K8]" table:style-name="ce5">
            <text:p>3.2</text:p>
          </table:table-cell>
          <table:table-cell office:value-type="float" office:value="16" table:formula="of:=[.K8]*[.L8]*0.8" table:style-name="ce5">
            <text:p>16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8]*[.S8]*0.43/[.R8]" table:style-name="ce5">
            <text:p>3.01</text:p>
          </table:table-cell>
          <table:table-cell office:value-type="float" office:value="15.049999999999999" table:formula="of:=[.R8]*[.S8]*0.43" table:style-name="ce23">
            <text:p>15.05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8" table:formula="of:=[.R8]*[.S8]*0.4/[.R8]" table:style-name="ce5">
            <text:p>2.8</text:p>
          </table:table-cell>
          <table:table-cell office:value-type="float" office:value="14" table:formula="of:=[.R8]*[.S8]*0.4" table:style-name="ce5">
            <text:p>14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8]; [.$AG$54:.$AH$67]; 2; FALSE)" table:style-name="ce3">
            <text:p>3.8</text:p>
          </table:table-cell>
          <table:table-cell office:value-type="float" office:value="3.8" table:formula="of:=[.AH8]" table:style-name="ce23">
            <text:p>3.8</text:p>
          </table:table-cell>
          <table:table-cell office:value-type="float" office:value="19" table:formula="of:=[.AF8]*[.AI8]" table:style-name="ce5">
            <text:p>19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8]; [.$AO$54:.$AP$67]; 2; FALSE)" table:style-name="ce24">
            <text:p>3.7</text:p>
          </table:table-cell>
          <table:table-cell office:value-type="float" office:value="3.7" table:formula="of:=[.AP8]" table:style-name="ce5">
            <text:p>3.7</text:p>
          </table:table-cell>
          <table:table-cell office:value-type="float" office:value="18.5" table:formula="of:=[.AN8]*[.AQ8]" table:style-name="ce5">
            <text:p>18.5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0" table:formula="of:=[.AV8]*[.AW8]" table:style-name="ce5">
            <text:p>20</text:p>
          </table:table-cell>
          <table:table-cell table:style-name="ce1"/>
          <table:table-cell office:value-type="float" office:value="4" table:style-name="ce20">
            <text:p>4</text:p>
          </table:table-cell>
          <table:table-cell office:value-type="string" table:style-name="ce3">
            <text:p>1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8]+1" table:style-name="ce5">
            <text:p>5</text:p>
          </table:table-cell>
          <table:table-cell office:value-type="float" office:value="25" table:formula="of:=[.BB8]*[.BD8]" table:style-name="ce5">
            <text:p>25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9]*[.E9]*0.86/[.D9]" table:style-name="ce5">
            <text:p>3.44</text:p>
          </table:table-cell>
          <table:table-cell office:value-type="float" office:value="17.2" table:formula="of:=[.D9]*[.E9]*0.86" table:style-name="ce5">
            <text:p>17.2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9]*[.L9]*0.8/[.K9]" table:style-name="ce5">
            <text:p>3.2</text:p>
          </table:table-cell>
          <table:table-cell office:value-type="float" office:value="16" table:formula="of:=[.K9]*[.L9]*0.8" table:style-name="ce5">
            <text:p>16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9]*[.S9]*0.43/[.R9]" table:style-name="ce5">
            <text:p>4.3</text:p>
          </table:table-cell>
          <table:table-cell office:value-type="float" office:value="21.5" table:formula="of:=[.R9]*[.S9]*0.43" table:style-name="ce23">
            <text:p>21.5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9]*[.S9]*0.4/[.R9]" table:style-name="ce5">
            <text:p>4</text:p>
          </table:table-cell>
          <table:table-cell office:value-type="float" office:value="20" table:formula="of:=[.R9]*[.S9]*0.4" table:style-name="ce5">
            <text:p>20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9]; [.$AG$54:.$AH$67]; 2; FALSE)" table:style-name="ce3">
            <text:p>3.6</text:p>
          </table:table-cell>
          <table:table-cell office:value-type="float" office:value="3.6" table:formula="of:=[.AH9]" table:style-name="ce23">
            <text:p>3.6</text:p>
          </table:table-cell>
          <table:table-cell office:value-type="float" office:value="18" table:formula="of:=[.AF9]*[.AI9]" table:style-name="ce5">
            <text:p>18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9]; [.$AO$54:.$AP$67]; 2; FALSE)" table:style-name="ce24">
            <text:p>3.6</text:p>
          </table:table-cell>
          <table:table-cell office:value-type="float" office:value="3.6" table:formula="of:=[.AP9]" table:style-name="ce5">
            <text:p>3.6</text:p>
          </table:table-cell>
          <table:table-cell office:value-type="float" office:value="18" table:formula="of:=[.AN9]*[.AQ9]" table:style-name="ce5">
            <text:p>18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0" table:formula="of:=[.AV9]*[.AW9]" table:style-name="ce5">
            <text:p>20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string" table:style-name="ce3">
            <text:p>2年古典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9]+1" table:style-name="ce5">
            <text:p>4</text:p>
          </table:table-cell>
          <table:table-cell office:value-type="float" office:value="20" table:formula="of:=[.BB9]*[.BD9]" table:style-name="ce5">
            <text:p>2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10]*[.E10]*0.86/[.D10]" table:style-name="ce5">
            <text:p>3.44</text:p>
          </table:table-cell>
          <table:table-cell office:value-type="float" office:value="34.4" table:formula="of:=[.D10]*[.E10]*0.86" table:style-name="ce5">
            <text:p>34.4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10]*[.L10]*0.8/[.K10]" table:style-name="ce5">
            <text:p>3.2</text:p>
          </table:table-cell>
          <table:table-cell office:value-type="float" office:value="32" table:formula="of:=[.K10]*[.L10]*0.8" table:style-name="ce5">
            <text:p>32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10]*[.S10]*0.43/[.R10]" table:style-name="ce5">
            <text:p>3.87</text:p>
          </table:table-cell>
          <table:table-cell office:value-type="float" office:value="38.700000000000003" table:formula="of:=[.R10]*[.S10]*0.43" table:style-name="ce23">
            <text:p>38.7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10]*[.S10]*0.4/[.R10]" table:style-name="ce5">
            <text:p>3.6</text:p>
          </table:table-cell>
          <table:table-cell office:value-type="float" office:value="36" table:formula="of:=[.R10]*[.S10]*0.4" table:style-name="ce5">
            <text:p>36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10]; [.$AG$54:.$AH$67]; 2; FALSE)" table:style-name="ce3">
            <text:p>3.4</text:p>
          </table:table-cell>
          <table:table-cell office:value-type="float" office:value="3.4" table:formula="of:=[.AH10]" table:style-name="ce23">
            <text:p>3.4</text:p>
          </table:table-cell>
          <table:table-cell office:value-type="float" office:value="34" table:formula="of:=[.AF10]*[.AI10]" table:style-name="ce5">
            <text:p>34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10]; [.$AO$54:.$AP$67]; 2; FALSE)" table:style-name="ce24">
            <text:p>3.4</text:p>
          </table:table-cell>
          <table:table-cell office:value-type="float" office:value="3.4" table:formula="of:=[.AP10]" table:style-name="ce5">
            <text:p>3.4</text:p>
          </table:table-cell>
          <table:table-cell office:value-type="float" office:value="34" table:formula="of:=[.AN10]*[.AQ10]" table:style-name="ce5">
            <text:p>34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40" table:formula="of:=[.AV10]*[.AW10]" table:style-name="ce5">
            <text:p>40</text:p>
          </table:table-cell>
          <table:table-cell table:style-name="ce1"/>
          <table:table-cell office:value-type="float" office:value="6" table:style-name="ce20">
            <text:p>6</text:p>
          </table:table-cell>
          <table:table-cell office:value-type="string" table:style-name="ce3">
            <text:p>3年古典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10]+1" table:style-name="ce5">
            <text:p>3</text:p>
          </table:table-cell>
          <table:table-cell office:value-type="float" office:value="30" table:formula="of:=[.BB10]*[.BD10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.72" table:formula="of:=[.D11]*[.E11]*0.86/[.D11]" table:style-name="ce5">
            <text:p>1.72</text:p>
          </table:table-cell>
          <table:table-cell office:value-type="float" office:value="13.76" table:formula="of:=[.D11]*[.E11]*0.86" table:style-name="ce5">
            <text:p>13.76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.6" table:formula="of:=[.K11]*[.L11]*0.8/[.K11]" table:style-name="ce5">
            <text:p>1.6</text:p>
          </table:table-cell>
          <table:table-cell office:value-type="float" office:value="12.8" table:formula="of:=[.K11]*[.L11]*0.8" table:style-name="ce5">
            <text:p>12.8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11]*[.S11]*0.43/[.R11]" table:style-name="ce5">
            <text:p>3.44</text:p>
          </table:table-cell>
          <table:table-cell office:value-type="float" office:value="27.52" table:formula="of:=[.R11]*[.S11]*0.43" table:style-name="ce23">
            <text:p>27.52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11]*[.S11]*0.4/[.R11]" table:style-name="ce5">
            <text:p>3.2</text:p>
          </table:table-cell>
          <table:table-cell office:value-type="float" office:value="25.6" table:formula="of:=[.R11]*[.S11]*0.4" table:style-name="ce5">
            <text:p>25.6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11]; [.$AG$54:.$AH$67]; 2; FALSE)" table:style-name="ce3">
            <text:p>4.3</text:p>
          </table:table-cell>
          <table:table-cell office:value-type="float" office:value="4.3" table:formula="of:=[.AH11]" table:style-name="ce23">
            <text:p>4.3</text:p>
          </table:table-cell>
          <table:table-cell office:value-type="float" office:value="34.4" table:formula="of:=[.AF11]*[.AI11]" table:style-name="ce5">
            <text:p>34.4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11]; [.$AO$54:.$AP$67]; 2; FALSE)" table:style-name="ce24">
            <text:p>4</text:p>
          </table:table-cell>
          <table:table-cell office:value-type="float" office:value="4" table:formula="of:=[.AP11]" table:style-name="ce5">
            <text:p>4</text:p>
          </table:table-cell>
          <table:table-cell office:value-type="float" office:value="32" table:formula="of:=[.AN11]*[.AQ11]" table:style-name="ce5">
            <text:p>32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6" table:formula="of:=[.AV11]*[.AW11]" table:style-name="ce5">
            <text:p>16</text:p>
          </table:table-cell>
          <table:table-cell table:style-name="ce1"/>
          <table:table-cell office:value-type="float" office:value="7" table:style-name="ce20">
            <text:p>7</text:p>
          </table:table-cell>
          <table:table-cell office:value-type="string" table:style-name="ce3">
            <text:p>数学1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11]+1" table:style-name="ce5">
            <text:p>5</text:p>
          </table:table-cell>
          <table:table-cell office:value-type="float" office:value="40" table:formula="of:=[.BB11]*[.BD11]" table:style-name="ce5">
            <text:p>4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12]*[.E12]*0.86/[.D12]" table:style-name="ce5">
            <text:p>2.58</text:p>
          </table:table-cell>
          <table:table-cell office:value-type="float" office:value="20.64" table:formula="of:=[.D12]*[.E12]*0.86" table:style-name="ce5">
            <text:p>20.64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.4000000000000004" table:formula="of:=[.K12]*[.L12]*0.8/[.K12]" table:style-name="ce5">
            <text:p>2.4</text:p>
          </table:table-cell>
          <table:table-cell office:value-type="float" office:value="19.200000000000003" table:formula="of:=[.K12]*[.L12]*0.8" table:style-name="ce5">
            <text:p>19.2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12]*[.S12]*0.43/[.R12]" table:style-name="ce5">
            <text:p>3.01</text:p>
          </table:table-cell>
          <table:table-cell office:value-type="float" office:value="24.08" table:formula="of:=[.R12]*[.S12]*0.43" table:style-name="ce23">
            <text:p>24.08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12]*[.S12]*0.4/[.R12]" table:style-name="ce5">
            <text:p>2.8</text:p>
          </table:table-cell>
          <table:table-cell office:value-type="float" office:value="22.400000000000002" table:formula="of:=[.R12]*[.S12]*0.4" table:style-name="ce5">
            <text:p>22.4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12]; [.$AG$54:.$AH$67]; 2; FALSE)" table:style-name="ce3">
            <text:p>4.2</text:p>
          </table:table-cell>
          <table:table-cell office:value-type="float" office:value="4.2" table:formula="of:=[.AH12]" table:style-name="ce23">
            <text:p>4.2</text:p>
          </table:table-cell>
          <table:table-cell office:value-type="float" office:value="33.6" table:formula="of:=[.AF12]*[.AI12]" table:style-name="ce5">
            <text:p>33.6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12]; [.$AO$54:.$AP$67]; 2; FALSE)" table:style-name="ce24">
            <text:p>3.9</text:p>
          </table:table-cell>
          <table:table-cell office:value-type="float" office:value="3.9" table:formula="of:=[.AP12]" table:style-name="ce5">
            <text:p>3.9</text:p>
          </table:table-cell>
          <table:table-cell office:value-type="float" office:value="31.2" table:formula="of:=[.AN12]*[.AQ12]" table:style-name="ce5">
            <text:p>31.2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4" table:formula="of:=[.AV12]*[.AW12]" table:style-name="ce5">
            <text:p>24</text:p>
          </table:table-cell>
          <table:table-cell table:style-name="ce1"/>
          <table:table-cell office:value-type="float" office:value="8" table:style-name="ce20">
            <text:p>8</text:p>
          </table:table-cell>
          <table:table-cell office:value-type="string" table:style-name="ce3">
            <text:p>数学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12]+1" table:style-name="ce5">
            <text:p>4</text:p>
          </table:table-cell>
          <table:table-cell office:value-type="float" office:value="32" table:formula="of:=[.BB12]*[.BD12]" table:style-name="ce5">
            <text:p>3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13]*[.E13]*0.86/[.D13]" table:style-name="ce5">
            <text:p>2.58</text:p>
          </table:table-cell>
          <table:table-cell office:value-type="float" office:value="15.48" table:formula="of:=[.D13]*[.E13]*0.86" table:style-name="ce5">
            <text:p>15.48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2.4" table:formula="of:=[.K13]*[.L13]*0.8/[.K13]" table:style-name="ce5">
            <text:p>2.4</text:p>
          </table:table-cell>
          <table:table-cell office:value-type="float" office:value="14.4" table:formula="of:=[.K13]*[.L13]*0.8" table:style-name="ce5">
            <text:p>14.4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13]*[.S13]*0.43/[.R13]" table:style-name="ce5">
            <text:p>4.3</text:p>
          </table:table-cell>
          <table:table-cell office:value-type="float" office:value="25.8" table:formula="of:=[.R13]*[.S13]*0.43" table:style-name="ce23">
            <text:p>25.8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13]*[.S13]*0.4/[.R13]" table:style-name="ce5">
            <text:p>4</text:p>
          </table:table-cell>
          <table:table-cell office:value-type="float" office:value="24" table:formula="of:=[.R13]*[.S13]*0.4" table:style-name="ce5">
            <text:p>24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13]; [.$AG$54:.$AH$67]; 2; FALSE)" table:style-name="ce3">
            <text:p>4</text:p>
          </table:table-cell>
          <table:table-cell office:value-type="float" office:value="4" table:formula="of:=[.AH13]" table:style-name="ce23">
            <text:p>4</text:p>
          </table:table-cell>
          <table:table-cell office:value-type="float" office:value="24" table:formula="of:=[.AF13]*[.AI13]" table:style-name="ce5">
            <text:p>24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13]; [.$AO$54:.$AP$67]; 2; FALSE)" table:style-name="ce24">
            <text:p>3.8</text:p>
          </table:table-cell>
          <table:table-cell office:value-type="float" office:value="3.8" table:formula="of:=[.AP13]" table:style-name="ce5">
            <text:p>3.8</text:p>
          </table:table-cell>
          <table:table-cell office:value-type="float" office:value="22.799999999999997" table:formula="of:=[.AN13]*[.AQ13]" table:style-name="ce5">
            <text:p>22.8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18" table:formula="of:=[.AV13]*[.AW13]" table:style-name="ce5">
            <text:p>18</text:p>
          </table:table-cell>
          <table:table-cell table:style-name="ce1"/>
          <table:table-cell office:value-type="float" office:value="9" table:style-name="ce20">
            <text:p>9</text:p>
          </table:table-cell>
          <table:table-cell office:value-type="string" table:style-name="ce3">
            <text:p>数学A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13]+1" table:style-name="ce5">
            <text:p>3</text:p>
          </table:table-cell>
          <table:table-cell office:value-type="float" office:value="18" table:formula="of:=[.BB13]*[.BD13]" table:style-name="ce5">
            <text:p>18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14]*[.E14]*0.86/[.D14]" table:style-name="ce5">
            <text:p>2.58</text:p>
          </table:table-cell>
          <table:table-cell office:value-type="float" office:value="15.48" table:formula="of:=[.D14]*[.E14]*0.86" table:style-name="ce5">
            <text:p>15.48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2.4" table:formula="of:=[.K14]*[.L14]*0.8/[.K14]" table:style-name="ce5">
            <text:p>2.4</text:p>
          </table:table-cell>
          <table:table-cell office:value-type="float" office:value="14.4" table:formula="of:=[.K14]*[.L14]*0.8" table:style-name="ce5">
            <text:p>14.4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3.8699999999999997" table:formula="of:=[.R14]*[.S14]*0.43/[.R14]" table:style-name="ce5">
            <text:p>3.87</text:p>
          </table:table-cell>
          <table:table-cell office:value-type="float" office:value="23.22" table:formula="of:=[.R14]*[.S14]*0.43" table:style-name="ce23">
            <text:p>23.22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14]*[.S14]*0.4/[.R14]" table:style-name="ce5">
            <text:p>3.6</text:p>
          </table:table-cell>
          <table:table-cell office:value-type="float" office:value="21.6" table:formula="of:=[.R14]*[.S14]*0.4" table:style-name="ce5">
            <text:p>21.6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14]; [.$AG$54:.$AH$67]; 2; FALSE)" table:style-name="ce3">
            <text:p>3.8</text:p>
          </table:table-cell>
          <table:table-cell office:value-type="float" office:value="3.8" table:formula="of:=[.AH14]" table:style-name="ce23">
            <text:p>3.8</text:p>
          </table:table-cell>
          <table:table-cell office:value-type="float" office:value="22.799999999999997" table:formula="of:=[.AF14]*[.AI14]" table:style-name="ce5">
            <text:p>22.8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14]; [.$AO$54:.$AP$67]; 2; FALSE)" table:style-name="ce24">
            <text:p>3.7</text:p>
          </table:table-cell>
          <table:table-cell office:value-type="float" office:value="3.7" table:formula="of:=[.AP14]" table:style-name="ce5">
            <text:p>3.7</text:p>
          </table:table-cell>
          <table:table-cell office:value-type="float" office:value="22.200000000000003" table:formula="of:=[.AN14]*[.AQ14]" table:style-name="ce5">
            <text:p>22.2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18" table:formula="of:=[.AV14]*[.AW14]" table:style-name="ce5">
            <text:p>18</text:p>
          </table:table-cell>
          <table:table-cell table:style-name="ce1"/>
          <table:table-cell office:value-type="float" office:value="10" table:style-name="ce20">
            <text:p>10</text:p>
          </table:table-cell>
          <table:table-cell office:value-type="string" table:style-name="ce3">
            <text:p>数学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14]+1" table:style-name="ce5">
            <text:p>5</text:p>
          </table:table-cell>
          <table:table-cell office:value-type="float" office:value="30" table:formula="of:=[.BB14]*[.BD14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15]*[.E15]*0.86/[.D15]" table:style-name="ce5">
            <text:p>3.44</text:p>
          </table:table-cell>
          <table:table-cell office:value-type="float" office:value="27.52" table:formula="of:=[.D15]*[.E15]*0.86" table:style-name="ce5">
            <text:p>27.52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15]*[.L15]*0.8/[.K15]" table:style-name="ce5">
            <text:p>3.2</text:p>
          </table:table-cell>
          <table:table-cell office:value-type="float" office:value="25.6" table:formula="of:=[.K15]*[.L15]*0.8" table:style-name="ce5">
            <text:p>25.6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15]*[.S15]*0.43/[.R15]" table:style-name="ce5">
            <text:p>3.44</text:p>
          </table:table-cell>
          <table:table-cell office:value-type="float" office:value="27.52" table:formula="of:=[.R15]*[.S15]*0.43" table:style-name="ce23">
            <text:p>27.52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15]*[.S15]*0.4/[.R15]" table:style-name="ce5">
            <text:p>3.2</text:p>
          </table:table-cell>
          <table:table-cell office:value-type="float" office:value="25.6" table:formula="of:=[.R15]*[.S15]*0.4" table:style-name="ce5">
            <text:p>25.6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15]; [.$AG$54:.$AH$67]; 2; FALSE)" table:style-name="ce3">
            <text:p>3.6</text:p>
          </table:table-cell>
          <table:table-cell office:value-type="float" office:value="3.6" table:formula="of:=[.AH15]" table:style-name="ce23">
            <text:p>3.6</text:p>
          </table:table-cell>
          <table:table-cell office:value-type="float" office:value="28.8" table:formula="of:=[.AF15]*[.AI15]" table:style-name="ce5">
            <text:p>28.8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15]; [.$AO$54:.$AP$67]; 2; FALSE)" table:style-name="ce24">
            <text:p>3.6</text:p>
          </table:table-cell>
          <table:table-cell office:value-type="float" office:value="3.6" table:formula="of:=[.AP15]" table:style-name="ce5">
            <text:p>3.6</text:p>
          </table:table-cell>
          <table:table-cell office:value-type="float" office:value="28.8" table:formula="of:=[.AN15]*[.AQ15]" table:style-name="ce5">
            <text:p>28.8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2" table:formula="of:=[.AV15]*[.AW15]" table:style-name="ce5">
            <text:p>32</text:p>
          </table:table-cell>
          <table:table-cell table:style-name="ce1"/>
          <table:table-cell office:value-type="float" office:value="11" table:style-name="ce20">
            <text:p>11</text:p>
          </table:table-cell>
          <table:table-cell office:value-type="string" table:style-name="ce3">
            <text:p>1年英語表現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15]+1" table:style-name="ce5">
            <text:p>4</text:p>
          </table:table-cell>
          <table:table-cell office:value-type="float" office:value="32" table:formula="of:=[.BB15]*[.BD15]" table:style-name="ce5">
            <text:p>3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16]*[.E16]*0.86/[.D16]" table:style-name="ce5">
            <text:p>3.44</text:p>
          </table:table-cell>
          <table:table-cell office:value-type="float" office:value="27.52" table:formula="of:=[.D16]*[.E16]*0.86" table:style-name="ce5">
            <text:p>27.52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16]*[.L16]*0.8/[.K16]" table:style-name="ce5">
            <text:p>3.2</text:p>
          </table:table-cell>
          <table:table-cell office:value-type="float" office:value="25.6" table:formula="of:=[.K16]*[.L16]*0.8" table:style-name="ce5">
            <text:p>25.6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16]*[.S16]*0.43/[.R16]" table:style-name="ce5">
            <text:p>3.01</text:p>
          </table:table-cell>
          <table:table-cell office:value-type="float" office:value="24.08" table:formula="of:=[.R16]*[.S16]*0.43" table:style-name="ce23">
            <text:p>24.08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16]*[.S16]*0.4/[.R16]" table:style-name="ce5">
            <text:p>2.8</text:p>
          </table:table-cell>
          <table:table-cell office:value-type="float" office:value="22.400000000000002" table:formula="of:=[.R16]*[.S16]*0.4" table:style-name="ce5">
            <text:p>22.4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16]; [.$AG$54:.$AH$67]; 2; FALSE)" table:style-name="ce3">
            <text:p>3.4</text:p>
          </table:table-cell>
          <table:table-cell office:value-type="float" office:value="3.4" table:formula="of:=[.AH16]" table:style-name="ce23">
            <text:p>3.4</text:p>
          </table:table-cell>
          <table:table-cell office:value-type="float" office:value="27.2" table:formula="of:=[.AF16]*[.AI16]" table:style-name="ce5">
            <text:p>27.2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16]; [.$AO$54:.$AP$67]; 2; FALSE)" table:style-name="ce24">
            <text:p>3.4</text:p>
          </table:table-cell>
          <table:table-cell office:value-type="float" office:value="3.4" table:formula="of:=[.AP16]" table:style-name="ce5">
            <text:p>3.4</text:p>
          </table:table-cell>
          <table:table-cell office:value-type="float" office:value="27.2" table:formula="of:=[.AN16]*[.AQ16]" table:style-name="ce5">
            <text:p>27.2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2" table:formula="of:=[.AV16]*[.AW16]" table:style-name="ce5">
            <text:p>32</text:p>
          </table:table-cell>
          <table:table-cell table:style-name="ce1"/>
          <table:table-cell office:value-type="float" office:value="12" table:style-name="ce20">
            <text:p>12</text:p>
          </table:table-cell>
          <table:table-cell office:value-type="string" table:style-name="ce3">
            <text:p>2年英語表現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16]+1" table:style-name="ce5">
            <text:p>3</text:p>
          </table:table-cell>
          <table:table-cell office:value-type="float" office:value="24" table:formula="of:=[.BB16]*[.BD16]" table:style-name="ce5">
            <text:p>24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17]*[.E17]*0.86/[.D17]" table:style-name="ce5">
            <text:p>4.3</text:p>
          </table:table-cell>
          <table:table-cell office:value-type="float" office:value="51.6" table:formula="of:=[.D17]*[.E17]*0.86" table:style-name="ce5">
            <text:p>51.6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17]*[.L17]*0.8/[.K17]" table:style-name="ce5">
            <text:p>4</text:p>
          </table:table-cell>
          <table:table-cell office:value-type="float" office:value="48" table:formula="of:=[.K17]*[.L17]*0.8" table:style-name="ce5">
            <text:p>48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17]*[.S17]*0.43/[.R17]" table:style-name="ce5">
            <text:p>4.3</text:p>
          </table:table-cell>
          <table:table-cell office:value-type="float" office:value="51.6" table:formula="of:=[.R17]*[.S17]*0.43" table:style-name="ce23">
            <text:p>51.6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17]*[.S17]*0.4/[.R17]" table:style-name="ce5">
            <text:p>4</text:p>
          </table:table-cell>
          <table:table-cell office:value-type="float" office:value="48" table:formula="of:=[.R17]*[.S17]*0.4" table:style-name="ce5">
            <text:p>48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17]; [.$AG$54:.$AH$67]; 2; FALSE)" table:style-name="ce3">
            <text:p>4.3</text:p>
          </table:table-cell>
          <table:table-cell office:value-type="float" office:value="4.3" table:formula="of:=[.AH17]" table:style-name="ce23">
            <text:p>4.3</text:p>
          </table:table-cell>
          <table:table-cell office:value-type="float" office:value="51.599999999999994" table:formula="of:=[.AF17]*[.AI17]" table:style-name="ce5">
            <text:p>51.6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17]; [.$AO$54:.$AP$67]; 2; FALSE)" table:style-name="ce24">
            <text:p>4</text:p>
          </table:table-cell>
          <table:table-cell office:value-type="float" office:value="4" table:formula="of:=[.AP17]" table:style-name="ce5">
            <text:p>4</text:p>
          </table:table-cell>
          <table:table-cell office:value-type="float" office:value="48" table:formula="of:=[.AN17]*[.AQ17]" table:style-name="ce5">
            <text:p>48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60" table:formula="of:=[.AV17]*[.AW17]" table:style-name="ce5">
            <text:p>60</text:p>
          </table:table-cell>
          <table:table-cell table:style-name="ce1"/>
          <table:table-cell office:value-type="float" office:value="13" table:style-name="ce20">
            <text:p>13</text:p>
          </table:table-cell>
          <table:table-cell office:value-type="string" table:style-name="ce3">
            <text:p>3年英語表現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17]+1" table:style-name="ce5">
            <text:p>5</text:p>
          </table:table-cell>
          <table:table-cell office:value-type="float" office:value="60" table:formula="of:=[.BB17]*[.BD17]" table:style-name="ce5">
            <text:p>6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18]*[.E18]*0.86/[.D18]" table:style-name="ce5">
            <text:p>3.44</text:p>
          </table:table-cell>
          <table:table-cell office:value-type="float" office:value="20.64" table:formula="of:=[.D18]*[.E18]*0.86" table:style-name="ce5">
            <text:p>20.64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2000000000000006" table:formula="of:=[.K18]*[.L18]*0.8/[.K18]" table:style-name="ce5">
            <text:p>3.2</text:p>
          </table:table-cell>
          <table:table-cell office:value-type="float" office:value="19.200000000000003" table:formula="of:=[.K18]*[.L18]*0.8" table:style-name="ce5">
            <text:p>19.2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3.8699999999999997" table:formula="of:=[.R18]*[.S18]*0.43/[.R18]" table:style-name="ce5">
            <text:p>3.87</text:p>
          </table:table-cell>
          <table:table-cell office:value-type="float" office:value="23.22" table:formula="of:=[.R18]*[.S18]*0.43" table:style-name="ce23">
            <text:p>23.22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18]*[.S18]*0.4/[.R18]" table:style-name="ce5">
            <text:p>3.6</text:p>
          </table:table-cell>
          <table:table-cell office:value-type="float" office:value="21.6" table:formula="of:=[.R18]*[.S18]*0.4" table:style-name="ce5">
            <text:p>21.6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18]; [.$AG$54:.$AH$67]; 2; FALSE)" table:style-name="ce3">
            <text:p>4.2</text:p>
          </table:table-cell>
          <table:table-cell office:value-type="float" office:value="4.2" table:formula="of:=[.AH18]" table:style-name="ce23">
            <text:p>4.2</text:p>
          </table:table-cell>
          <table:table-cell office:value-type="float" office:value="25.200000000000003" table:formula="of:=[.AF18]*[.AI18]" table:style-name="ce5">
            <text:p>25.2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18]; [.$AO$54:.$AP$67]; 2; FALSE)" table:style-name="ce24">
            <text:p>3.9</text:p>
          </table:table-cell>
          <table:table-cell office:value-type="float" office:value="3.9" table:formula="of:=[.AP18]" table:style-name="ce5">
            <text:p>3.9</text:p>
          </table:table-cell>
          <table:table-cell office:value-type="float" office:value="23.4" table:formula="of:=[.AN18]*[.AQ18]" table:style-name="ce5">
            <text:p>23.4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4" table:formula="of:=[.AV18]*[.AW18]" table:style-name="ce5">
            <text:p>24</text:p>
          </table:table-cell>
          <table:table-cell table:style-name="ce1"/>
          <table:table-cell office:value-type="float" office:value="14" table:style-name="ce20">
            <text:p>14</text:p>
          </table:table-cell>
          <table:table-cell office:value-type="string" table:style-name="ce3">
            <text:p>1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18]+1" table:style-name="ce5">
            <text:p>4</text:p>
          </table:table-cell>
          <table:table-cell office:value-type="float" office:value="24" table:formula="of:=[.BB18]*[.BD18]" table:style-name="ce5">
            <text:p>24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19]*[.E19]*0.86/[.D19]" table:style-name="ce5">
            <text:p>3.44</text:p>
          </table:table-cell>
          <table:table-cell office:value-type="float" office:value="20.64" table:formula="of:=[.D19]*[.E19]*0.86" table:style-name="ce5">
            <text:p>20.64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2000000000000006" table:formula="of:=[.K19]*[.L19]*0.8/[.K19]" table:style-name="ce5">
            <text:p>3.2</text:p>
          </table:table-cell>
          <table:table-cell office:value-type="float" office:value="19.200000000000003" table:formula="of:=[.K19]*[.L19]*0.8" table:style-name="ce5">
            <text:p>19.2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19]*[.S19]*0.43/[.R19]" table:style-name="ce5">
            <text:p>3.44</text:p>
          </table:table-cell>
          <table:table-cell office:value-type="float" office:value="20.64" table:formula="of:=[.R19]*[.S19]*0.43" table:style-name="ce23">
            <text:p>20.64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.2000000000000006" table:formula="of:=[.R19]*[.S19]*0.4/[.R19]" table:style-name="ce5">
            <text:p>3.2</text:p>
          </table:table-cell>
          <table:table-cell office:value-type="float" office:value="19.200000000000003" table:formula="of:=[.R19]*[.S19]*0.4" table:style-name="ce5">
            <text:p>19.2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19]; [.$AG$54:.$AH$67]; 2; FALSE)" table:style-name="ce3">
            <text:p>4</text:p>
          </table:table-cell>
          <table:table-cell office:value-type="float" office:value="4" table:formula="of:=[.AH19]" table:style-name="ce23">
            <text:p>4</text:p>
          </table:table-cell>
          <table:table-cell office:value-type="float" office:value="24" table:formula="of:=[.AF19]*[.AI19]" table:style-name="ce5">
            <text:p>24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19]; [.$AO$54:.$AP$67]; 2; FALSE)" table:style-name="ce24">
            <text:p>3.8</text:p>
          </table:table-cell>
          <table:table-cell office:value-type="float" office:value="3.8" table:formula="of:=[.AP19]" table:style-name="ce5">
            <text:p>3.8</text:p>
          </table:table-cell>
          <table:table-cell office:value-type="float" office:value="22.799999999999997" table:formula="of:=[.AN19]*[.AQ19]" table:style-name="ce5">
            <text:p>22.8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4" table:formula="of:=[.AV19]*[.AW19]" table:style-name="ce5">
            <text:p>24</text:p>
          </table:table-cell>
          <table:table-cell table:style-name="ce1"/>
          <table:table-cell office:value-type="float" office:value="15" table:style-name="ce20">
            <text:p>15</text:p>
          </table:table-cell>
          <table:table-cell office:value-type="string" table:style-name="ce3">
            <text:p>2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19]+1" table:style-name="ce5">
            <text:p>3</text:p>
          </table:table-cell>
          <table:table-cell office:value-type="float" office:value="18" table:formula="of:=[.BB19]*[.BD19]" table:style-name="ce5">
            <text:p>18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20]*[.E20]*0.86/[.D20]" table:style-name="ce5">
            <text:p>4.3</text:p>
          </table:table-cell>
          <table:table-cell office:value-type="float" office:value="25.8" table:formula="of:=[.D20]*[.E20]*0.86" table:style-name="ce5">
            <text:p>25.8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20]*[.L20]*0.8/[.K20]" table:style-name="ce5">
            <text:p>4</text:p>
          </table:table-cell>
          <table:table-cell office:value-type="float" office:value="24" table:formula="of:=[.K20]*[.L20]*0.8" table:style-name="ce5">
            <text:p>24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20]*[.S20]*0.43/[.R20]" table:style-name="ce5">
            <text:p>3.01</text:p>
          </table:table-cell>
          <table:table-cell office:value-type="float" office:value="18.059999999999999" table:formula="of:=[.R20]*[.S20]*0.43" table:style-name="ce23">
            <text:p>18.06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20]*[.S20]*0.4/[.R20]" table:style-name="ce5">
            <text:p>2.8</text:p>
          </table:table-cell>
          <table:table-cell office:value-type="float" office:value="16.8" table:formula="of:=[.R20]*[.S20]*0.4" table:style-name="ce5">
            <text:p>16.8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20]; [.$AG$54:.$AH$67]; 2; FALSE)" table:style-name="ce3">
            <text:p>3.8</text:p>
          </table:table-cell>
          <table:table-cell office:value-type="float" office:value="3.8" table:formula="of:=[.AH20]" table:style-name="ce23">
            <text:p>3.8</text:p>
          </table:table-cell>
          <table:table-cell office:value-type="float" office:value="22.799999999999997" table:formula="of:=[.AF20]*[.AI20]" table:style-name="ce5">
            <text:p>22.8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20]; [.$AO$54:.$AP$67]; 2; FALSE)" table:style-name="ce24">
            <text:p>3.7</text:p>
          </table:table-cell>
          <table:table-cell office:value-type="float" office:value="3.7" table:formula="of:=[.AP20]" table:style-name="ce5">
            <text:p>3.7</text:p>
          </table:table-cell>
          <table:table-cell office:value-type="float" office:value="22.200000000000003" table:formula="of:=[.AN20]*[.AQ20]" table:style-name="ce5">
            <text:p>22.2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30" table:formula="of:=[.AV20]*[.AW20]" table:style-name="ce5">
            <text:p>30</text:p>
          </table:table-cell>
          <table:table-cell table:style-name="ce1"/>
          <table:table-cell office:value-type="float" office:value="16" table:style-name="ce20">
            <text:p>16</text:p>
          </table:table-cell>
          <table:table-cell office:value-type="string" table:style-name="ce3">
            <text:p>3年英語コミュ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20]+1" table:style-name="ce5">
            <text:p>5</text:p>
          </table:table-cell>
          <table:table-cell office:value-type="float" office:value="30" table:formula="of:=[.BB20]*[.BD20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21]*[.E21]*0.86/[.D21]" table:style-name="ce5">
            <text:p>3.44</text:p>
          </table:table-cell>
          <table:table-cell office:value-type="float" office:value="13.76" table:formula="of:=[.D21]*[.E21]*0.86" table:style-name="ce5">
            <text:p>13.76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21]*[.L21]*0.8/[.K21]" table:style-name="ce5">
            <text:p>3.2</text:p>
          </table:table-cell>
          <table:table-cell office:value-type="float" office:value="12.8" table:formula="of:=[.K21]*[.L21]*0.8" table:style-name="ce5">
            <text:p>12.8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21]*[.S21]*0.43/[.R21]" table:style-name="ce5">
            <text:p>4.3</text:p>
          </table:table-cell>
          <table:table-cell office:value-type="float" office:value="17.2" table:formula="of:=[.R21]*[.S21]*0.43" table:style-name="ce23">
            <text:p>17.2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21]*[.S21]*0.4/[.R21]" table:style-name="ce5">
            <text:p>4</text:p>
          </table:table-cell>
          <table:table-cell office:value-type="float" office:value="16" table:formula="of:=[.R21]*[.S21]*0.4" table:style-name="ce5">
            <text:p>16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21]; [.$AG$54:.$AH$67]; 2; FALSE)" table:style-name="ce3">
            <text:p>3.6</text:p>
          </table:table-cell>
          <table:table-cell office:value-type="float" office:value="3.6" table:formula="of:=[.AH21]" table:style-name="ce23">
            <text:p>3.6</text:p>
          </table:table-cell>
          <table:table-cell office:value-type="float" office:value="14.4" table:formula="of:=[.AF21]*[.AI21]" table:style-name="ce5">
            <text:p>14.4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21]; [.$AO$54:.$AP$67]; 2; FALSE)" table:style-name="ce24">
            <text:p>3.6</text:p>
          </table:table-cell>
          <table:table-cell office:value-type="float" office:value="3.6" table:formula="of:=[.AP21]" table:style-name="ce5">
            <text:p>3.6</text:p>
          </table:table-cell>
          <table:table-cell office:value-type="float" office:value="14.4" table:formula="of:=[.AN21]*[.AQ21]" table:style-name="ce5">
            <text:p>14.4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formula="of:=[.AV21]*[.AW21]" table:style-name="ce5">
            <text:p>16</text:p>
          </table:table-cell>
          <table:table-cell table:style-name="ce1"/>
          <table:table-cell office:value-type="float" office:value="17" table:style-name="ce20">
            <text:p>17</text:p>
          </table:table-cell>
          <table:table-cell office:value-type="string" table:style-name="ce3">
            <text:p>生物基礎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21]+1" table:style-name="ce5">
            <text:p>4</text:p>
          </table:table-cell>
          <table:table-cell office:value-type="float" office:value="16" table:formula="of:=[.BB21]*[.BD21]" table:style-name="ce5">
            <text:p>1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22]*[.E22]*0.86/[.D22]" table:style-name="ce5">
            <text:p>2.58</text:p>
          </table:table-cell>
          <table:table-cell office:value-type="float" office:value="10.32" table:formula="of:=[.D22]*[.E22]*0.86" table:style-name="ce5">
            <text:p>10.32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.4000000000000004" table:formula="of:=[.K22]*[.L22]*0.8/[.K22]" table:style-name="ce5">
            <text:p>2.4</text:p>
          </table:table-cell>
          <table:table-cell office:value-type="float" office:value="9.6000000000000014" table:formula="of:=[.K22]*[.L22]*0.8" table:style-name="ce5">
            <text:p>9.6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22]*[.S22]*0.43/[.R22]" table:style-name="ce5">
            <text:p>3.87</text:p>
          </table:table-cell>
          <table:table-cell office:value-type="float" office:value="15.48" table:formula="of:=[.R22]*[.S22]*0.43" table:style-name="ce23">
            <text:p>15.48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22]*[.S22]*0.4/[.R22]" table:style-name="ce5">
            <text:p>3.6</text:p>
          </table:table-cell>
          <table:table-cell office:value-type="float" office:value="14.4" table:formula="of:=[.R22]*[.S22]*0.4" table:style-name="ce5">
            <text:p>14.4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22]; [.$AG$54:.$AH$67]; 2; FALSE)" table:style-name="ce3">
            <text:p>3.4</text:p>
          </table:table-cell>
          <table:table-cell office:value-type="float" office:value="3.4" table:formula="of:=[.AH22]" table:style-name="ce23">
            <text:p>3.4</text:p>
          </table:table-cell>
          <table:table-cell office:value-type="float" office:value="13.6" table:formula="of:=[.AF22]*[.AI22]" table:style-name="ce5">
            <text:p>13.6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22]; [.$AO$54:.$AP$67]; 2; FALSE)" table:style-name="ce24">
            <text:p>3.4</text:p>
          </table:table-cell>
          <table:table-cell office:value-type="float" office:value="3.4" table:formula="of:=[.AP22]" table:style-name="ce5">
            <text:p>3.4</text:p>
          </table:table-cell>
          <table:table-cell office:value-type="float" office:value="13.6" table:formula="of:=[.AN22]*[.AQ22]" table:style-name="ce5">
            <text:p>13.6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2" table:formula="of:=[.AV22]*[.AW22]" table:style-name="ce5">
            <text:p>12</text:p>
          </table:table-cell>
          <table:table-cell table:style-name="ce1"/>
          <table:table-cell office:value-type="float" office:value="18" table:style-name="ce20">
            <text:p>18</text:p>
          </table:table-cell>
          <table:table-cell office:value-type="string" table:style-name="ce3">
            <text:p>化学基礎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22]+1" table:style-name="ce5">
            <text:p>3</text:p>
          </table:table-cell>
          <table:table-cell office:value-type="float" office:value="12" table:formula="of:=[.BB22]*[.BD22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.72" table:formula="of:=[.D23]*[.E23]*0.86/[.D23]" table:style-name="ce5">
            <text:p>1.72</text:p>
          </table:table-cell>
          <table:table-cell office:value-type="float" office:value="6.88" table:formula="of:=[.D23]*[.E23]*0.86" table:style-name="ce5">
            <text:p>6.88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.6" table:formula="of:=[.K23]*[.L23]*0.8/[.K23]" table:style-name="ce5">
            <text:p>1.6</text:p>
          </table:table-cell>
          <table:table-cell office:value-type="float" office:value="6.4" table:formula="of:=[.K23]*[.L23]*0.8" table:style-name="ce5">
            <text:p>6.4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23]*[.S23]*0.43/[.R23]" table:style-name="ce5">
            <text:p>3.44</text:p>
          </table:table-cell>
          <table:table-cell office:value-type="float" office:value="13.76" table:formula="of:=[.R23]*[.S23]*0.43" table:style-name="ce23">
            <text:p>13.76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23]*[.S23]*0.4/[.R23]" table:style-name="ce5">
            <text:p>3.2</text:p>
          </table:table-cell>
          <table:table-cell office:value-type="float" office:value="12.8" table:formula="of:=[.R23]*[.S23]*0.4" table:style-name="ce5">
            <text:p>12.8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23]; [.$AG$54:.$AH$67]; 2; FALSE)" table:style-name="ce3">
            <text:p>4.3</text:p>
          </table:table-cell>
          <table:table-cell office:value-type="float" office:value="4.3" table:formula="of:=[.AH23]" table:style-name="ce23">
            <text:p>4.3</text:p>
          </table:table-cell>
          <table:table-cell office:value-type="float" office:value="17.2" table:formula="of:=[.AF23]*[.AI23]" table:style-name="ce5">
            <text:p>17.2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23]; [.$AO$54:.$AP$67]; 2; FALSE)" table:style-name="ce24">
            <text:p>4</text:p>
          </table:table-cell>
          <table:table-cell office:value-type="float" office:value="4" table:formula="of:=[.AP23]" table:style-name="ce5">
            <text:p>4</text:p>
          </table:table-cell>
          <table:table-cell office:value-type="float" office:value="16" table:formula="of:=[.AN23]*[.AQ23]" table:style-name="ce5">
            <text:p>16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8" table:formula="of:=[.AV23]*[.AW23]" table:style-name="ce5">
            <text:p>8</text:p>
          </table:table-cell>
          <table:table-cell table:style-name="ce1"/>
          <table:table-cell office:value-type="float" office:value="19" table:style-name="ce20">
            <text:p>19</text:p>
          </table:table-cell>
          <table:table-cell office:value-type="string" table:style-name="ce3">
            <text:p>物理基礎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23]+1" table:style-name="ce5">
            <text:p>5</text:p>
          </table:table-cell>
          <table:table-cell office:value-type="float" office:value="20" table:formula="of:=[.BB23]*[.BD23]" table:style-name="ce5">
            <text:p>2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24]*[.E24]*0.86/[.D24]" table:style-name="ce5">
            <text:p>4.3</text:p>
          </table:table-cell>
          <table:table-cell office:value-type="float" office:value="8.6" table:formula="of:=[.D24]*[.E24]*0.86" table:style-name="ce5">
            <text:p>8.6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24]*[.L24]*0.8/[.K24]" table:style-name="ce5">
            <text:p>4</text:p>
          </table:table-cell>
          <table:table-cell office:value-type="float" office:value="8" table:formula="of:=[.K24]*[.L24]*0.8" table:style-name="ce5">
            <text:p>8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24]*[.S24]*0.43/[.R24]" table:style-name="ce5">
            <text:p>3.01</text:p>
          </table:table-cell>
          <table:table-cell office:value-type="float" office:value="6.02" table:formula="of:=[.R24]*[.S24]*0.43" table:style-name="ce23">
            <text:p>6.02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24]*[.S24]*0.4/[.R24]" table:style-name="ce5">
            <text:p>2.8</text:p>
          </table:table-cell>
          <table:table-cell office:value-type="float" office:value="5.6000000000000005" table:formula="of:=[.R24]*[.S24]*0.4" table:style-name="ce5">
            <text:p>5.6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24]; [.$AG$54:.$AH$67]; 2; FALSE)" table:style-name="ce3">
            <text:p>4.2</text:p>
          </table:table-cell>
          <table:table-cell office:value-type="float" office:value="4.2" table:formula="of:=[.AH24]" table:style-name="ce23">
            <text:p>4.2</text:p>
          </table:table-cell>
          <table:table-cell office:value-type="float" office:value="8.4" table:formula="of:=[.AF24]*[.AI24]" table:style-name="ce5">
            <text:p>8.4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24]; [.$AO$54:.$AP$67]; 2; FALSE)" table:style-name="ce24">
            <text:p>3.9</text:p>
          </table:table-cell>
          <table:table-cell office:value-type="float" office:value="3.9" table:formula="of:=[.AP24]" table:style-name="ce5">
            <text:p>3.9</text:p>
          </table:table-cell>
          <table:table-cell office:value-type="float" office:value="7.8" table:formula="of:=[.AN24]*[.AQ24]" table:style-name="ce5">
            <text:p>7.8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24]*[.AW24]" table:style-name="ce5">
            <text:p>10</text:p>
          </table:table-cell>
          <table:table-cell table:style-name="ce1"/>
          <table:table-cell office:value-type="float" office:value="20" table:style-name="ce20">
            <text:p>20</text:p>
          </table:table-cell>
          <table:table-cell office:value-type="string" table:style-name="ce3">
            <text:p>1年保健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24]+1" table:style-name="ce5">
            <text:p>4</text:p>
          </table:table-cell>
          <table:table-cell office:value-type="float" office:value="8" table:formula="of:=[.BB24]*[.BD24]" table:style-name="ce5">
            <text:p>8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25]*[.E25]*0.86/[.D25]" table:style-name="ce5">
            <text:p>4.3</text:p>
          </table:table-cell>
          <table:table-cell office:value-type="float" office:value="8.6" table:formula="of:=[.D25]*[.E25]*0.86" table:style-name="ce5">
            <text:p>8.6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25]*[.L25]*0.8/[.K25]" table:style-name="ce5">
            <text:p>4</text:p>
          </table:table-cell>
          <table:table-cell office:value-type="float" office:value="8" table:formula="of:=[.K25]*[.L25]*0.8" table:style-name="ce5">
            <text:p>8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25]*[.S25]*0.43/[.R25]" table:style-name="ce5">
            <text:p>4.3</text:p>
          </table:table-cell>
          <table:table-cell office:value-type="float" office:value="8.6" table:formula="of:=[.R25]*[.S25]*0.43" table:style-name="ce23">
            <text:p>8.6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25]*[.S25]*0.4/[.R25]" table:style-name="ce5">
            <text:p>4</text:p>
          </table:table-cell>
          <table:table-cell office:value-type="float" office:value="8" table:formula="of:=[.R25]*[.S25]*0.4" table:style-name="ce5">
            <text:p>8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25]; [.$AG$54:.$AH$67]; 2; FALSE)" table:style-name="ce3">
            <text:p>4</text:p>
          </table:table-cell>
          <table:table-cell office:value-type="float" office:value="4" table:formula="of:=[.AH25]" table:style-name="ce23">
            <text:p>4</text:p>
          </table:table-cell>
          <table:table-cell office:value-type="float" office:value="8" table:formula="of:=[.AF25]*[.AI25]" table:style-name="ce5">
            <text:p>8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25]; [.$AO$54:.$AP$67]; 2; FALSE)" table:style-name="ce24">
            <text:p>3.8</text:p>
          </table:table-cell>
          <table:table-cell office:value-type="float" office:value="3.8" table:formula="of:=[.AP25]" table:style-name="ce5">
            <text:p>3.8</text:p>
          </table:table-cell>
          <table:table-cell office:value-type="float" office:value="7.6" table:formula="of:=[.AN25]*[.AQ25]" table:style-name="ce5">
            <text:p>7.6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25]*[.AW25]" table:style-name="ce5">
            <text:p>10</text:p>
          </table:table-cell>
          <table:table-cell table:style-name="ce1"/>
          <table:table-cell office:value-type="float" office:value="21" table:style-name="ce20">
            <text:p>21</text:p>
          </table:table-cell>
          <table:table-cell office:value-type="string" table:style-name="ce3">
            <text:p>2年保健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25]+1" table:style-name="ce5">
            <text:p>3</text:p>
          </table:table-cell>
          <table:table-cell office:value-type="float" office:value="6" table:formula="of:=[.BB25]*[.BD25]" table:style-name="ce5">
            <text:p>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26]*[.E26]*0.86/[.D26]" table:style-name="ce5">
            <text:p>4.3</text:p>
          </table:table-cell>
          <table:table-cell office:value-type="float" office:value="8.6" table:formula="of:=[.D26]*[.E26]*0.86" table:style-name="ce5">
            <text:p>8.6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26]*[.L26]*0.8/[.K26]" table:style-name="ce5">
            <text:p>4</text:p>
          </table:table-cell>
          <table:table-cell office:value-type="float" office:value="8" table:formula="of:=[.K26]*[.L26]*0.8" table:style-name="ce5">
            <text:p>8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26]*[.S26]*0.43/[.R26]" table:style-name="ce5">
            <text:p>3.87</text:p>
          </table:table-cell>
          <table:table-cell office:value-type="float" office:value="7.74" table:formula="of:=[.R26]*[.S26]*0.43" table:style-name="ce23">
            <text:p>7.74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26]*[.S26]*0.4/[.R26]" table:style-name="ce5">
            <text:p>3.6</text:p>
          </table:table-cell>
          <table:table-cell office:value-type="float" office:value="7.2" table:formula="of:=[.R26]*[.S26]*0.4" table:style-name="ce5">
            <text:p>7.2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26]; [.$AG$54:.$AH$67]; 2; FALSE)" table:style-name="ce3">
            <text:p>3.8</text:p>
          </table:table-cell>
          <table:table-cell office:value-type="float" office:value="3.8" table:formula="of:=[.AH26]" table:style-name="ce23">
            <text:p>3.8</text:p>
          </table:table-cell>
          <table:table-cell office:value-type="float" office:value="7.6" table:formula="of:=[.AF26]*[.AI26]" table:style-name="ce5">
            <text:p>7.6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26]; [.$AO$54:.$AP$67]; 2; FALSE)" table:style-name="ce24">
            <text:p>3.7</text:p>
          </table:table-cell>
          <table:table-cell office:value-type="float" office:value="3.7" table:formula="of:=[.AP26]" table:style-name="ce5">
            <text:p>3.7</text:p>
          </table:table-cell>
          <table:table-cell office:value-type="float" office:value="7.4" table:formula="of:=[.AN26]*[.AQ26]" table:style-name="ce5">
            <text:p>7.4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26]*[.AW26]" table:style-name="ce5">
            <text:p>10</text:p>
          </table:table-cell>
          <table:table-cell table:style-name="ce1"/>
          <table:table-cell office:value-type="float" office:value="22" table:style-name="ce20">
            <text:p>22</text:p>
          </table:table-cell>
          <table:table-cell office:value-type="string" table:style-name="ce3">
            <text:p>3年保健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26]+1" table:style-name="ce5">
            <text:p>5</text:p>
          </table:table-cell>
          <table:table-cell office:value-type="float" office:value="10" table:formula="of:=[.BB26]*[.BD26]" table:style-name="ce5">
            <text:p>1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27]*[.E27]*0.86/[.D27]" table:style-name="ce5">
            <text:p>3.44</text:p>
          </table:table-cell>
          <table:table-cell office:value-type="float" office:value="13.76" table:formula="of:=[.D27]*[.E27]*0.86" table:style-name="ce5">
            <text:p>13.76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27]*[.L27]*0.8/[.K27]" table:style-name="ce5">
            <text:p>3.2</text:p>
          </table:table-cell>
          <table:table-cell office:value-type="float" office:value="12.8" table:formula="of:=[.K27]*[.L27]*0.8" table:style-name="ce5">
            <text:p>12.8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27]*[.S27]*0.43/[.R27]" table:style-name="ce5">
            <text:p>3.44</text:p>
          </table:table-cell>
          <table:table-cell office:value-type="float" office:value="13.76" table:formula="of:=[.R27]*[.S27]*0.43" table:style-name="ce23">
            <text:p>13.76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27]*[.S27]*0.4/[.R27]" table:style-name="ce5">
            <text:p>3.2</text:p>
          </table:table-cell>
          <table:table-cell office:value-type="float" office:value="12.8" table:formula="of:=[.R27]*[.S27]*0.4" table:style-name="ce5">
            <text:p>12.8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27]; [.$AG$54:.$AH$67]; 2; FALSE)" table:style-name="ce3">
            <text:p>3.6</text:p>
          </table:table-cell>
          <table:table-cell office:value-type="float" office:value="3.6" table:formula="of:=[.AH27]" table:style-name="ce23">
            <text:p>3.6</text:p>
          </table:table-cell>
          <table:table-cell office:value-type="float" office:value="14.4" table:formula="of:=[.AF27]*[.AI27]" table:style-name="ce5">
            <text:p>14.4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27]; [.$AO$54:.$AP$67]; 2; FALSE)" table:style-name="ce24">
            <text:p>3.6</text:p>
          </table:table-cell>
          <table:table-cell office:value-type="float" office:value="3.6" table:formula="of:=[.AP27]" table:style-name="ce5">
            <text:p>3.6</text:p>
          </table:table-cell>
          <table:table-cell office:value-type="float" office:value="14.4" table:formula="of:=[.AN27]*[.AQ27]" table:style-name="ce5">
            <text:p>14.4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formula="of:=[.AV27]*[.AW27]" table:style-name="ce5">
            <text:p>16</text:p>
          </table:table-cell>
          <table:table-cell table:style-name="ce1"/>
          <table:table-cell office:value-type="float" office:value="23" table:style-name="ce20">
            <text:p>23</text:p>
          </table:table-cell>
          <table:table-cell office:value-type="string" table:style-name="ce3">
            <text:p>1年体育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27]+1" table:style-name="ce5">
            <text:p>4</text:p>
          </table:table-cell>
          <table:table-cell office:value-type="float" office:value="16" table:formula="of:=[.BB27]*[.BD27]" table:style-name="ce5">
            <text:p>1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28]*[.E28]*0.86/[.D28]" table:style-name="ce5">
            <text:p>3.44</text:p>
          </table:table-cell>
          <table:table-cell office:value-type="float" office:value="13.76" table:formula="of:=[.D28]*[.E28]*0.86" table:style-name="ce5">
            <text:p>13.76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28]*[.L28]*0.8/[.K28]" table:style-name="ce5">
            <text:p>3.2</text:p>
          </table:table-cell>
          <table:table-cell office:value-type="float" office:value="12.8" table:formula="of:=[.K28]*[.L28]*0.8" table:style-name="ce5">
            <text:p>12.8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28]*[.S28]*0.43/[.R28]" table:style-name="ce5">
            <text:p>3.01</text:p>
          </table:table-cell>
          <table:table-cell office:value-type="float" office:value="12.04" table:formula="of:=[.R28]*[.S28]*0.43" table:style-name="ce23">
            <text:p>12.04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28]*[.S28]*0.4/[.R28]" table:style-name="ce5">
            <text:p>2.8</text:p>
          </table:table-cell>
          <table:table-cell office:value-type="float" office:value="11.200000000000001" table:formula="of:=[.R28]*[.S28]*0.4" table:style-name="ce5">
            <text:p>11.2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28]; [.$AG$54:.$AH$67]; 2; FALSE)" table:style-name="ce3">
            <text:p>3.4</text:p>
          </table:table-cell>
          <table:table-cell office:value-type="float" office:value="3.4" table:formula="of:=[.AH28]" table:style-name="ce23">
            <text:p>3.4</text:p>
          </table:table-cell>
          <table:table-cell office:value-type="float" office:value="13.6" table:formula="of:=[.AF28]*[.AI28]" table:style-name="ce5">
            <text:p>13.6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28]; [.$AO$54:.$AP$67]; 2; FALSE)" table:style-name="ce24">
            <text:p>3.4</text:p>
          </table:table-cell>
          <table:table-cell office:value-type="float" office:value="3.4" table:formula="of:=[.AP28]" table:style-name="ce5">
            <text:p>3.4</text:p>
          </table:table-cell>
          <table:table-cell office:value-type="float" office:value="13.6" table:formula="of:=[.AN28]*[.AQ28]" table:style-name="ce5">
            <text:p>13.6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formula="of:=[.AV28]*[.AW28]" table:style-name="ce5">
            <text:p>16</text:p>
          </table:table-cell>
          <table:table-cell table:style-name="ce1"/>
          <table:table-cell office:value-type="float" office:value="24" table:style-name="ce20">
            <text:p>24</text:p>
          </table:table-cell>
          <table:table-cell office:value-type="string" table:style-name="ce3">
            <text:p>2年体育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28]+1" table:style-name="ce5">
            <text:p>3</text:p>
          </table:table-cell>
          <table:table-cell office:value-type="float" office:value="12" table:formula="of:=[.BB28]*[.BD28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29]*[.E29]*0.86/[.D29]" table:style-name="ce5">
            <text:p>4.3</text:p>
          </table:table-cell>
          <table:table-cell office:value-type="float" office:value="17.2" table:formula="of:=[.D29]*[.E29]*0.86" table:style-name="ce5">
            <text:p>17.2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29]*[.L29]*0.8/[.K29]" table:style-name="ce5">
            <text:p>4</text:p>
          </table:table-cell>
          <table:table-cell office:value-type="float" office:value="16" table:formula="of:=[.K29]*[.L29]*0.8" table:style-name="ce5">
            <text:p>16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29]*[.S29]*0.43/[.R29]" table:style-name="ce5">
            <text:p>4.3</text:p>
          </table:table-cell>
          <table:table-cell office:value-type="float" office:value="17.2" table:formula="of:=[.R29]*[.S29]*0.43" table:style-name="ce23">
            <text:p>17.2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29]*[.S29]*0.4/[.R29]" table:style-name="ce5">
            <text:p>4</text:p>
          </table:table-cell>
          <table:table-cell office:value-type="float" office:value="16" table:formula="of:=[.R29]*[.S29]*0.4" table:style-name="ce5">
            <text:p>16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29]; [.$AG$54:.$AH$67]; 2; FALSE)" table:style-name="ce3">
            <text:p>4.3</text:p>
          </table:table-cell>
          <table:table-cell office:value-type="float" office:value="4.3" table:formula="of:=[.AH29]" table:style-name="ce23">
            <text:p>4.3</text:p>
          </table:table-cell>
          <table:table-cell office:value-type="float" office:value="17.2" table:formula="of:=[.AF29]*[.AI29]" table:style-name="ce5">
            <text:p>17.2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29]; [.$AO$54:.$AP$67]; 2; FALSE)" table:style-name="ce24">
            <text:p>4</text:p>
          </table:table-cell>
          <table:table-cell office:value-type="float" office:value="4" table:formula="of:=[.AP29]" table:style-name="ce5">
            <text:p>4</text:p>
          </table:table-cell>
          <table:table-cell office:value-type="float" office:value="16" table:formula="of:=[.AN29]*[.AQ29]" table:style-name="ce5">
            <text:p>16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0" table:formula="of:=[.AV29]*[.AW29]" table:style-name="ce5">
            <text:p>20</text:p>
          </table:table-cell>
          <table:table-cell table:style-name="ce1"/>
          <table:table-cell office:value-type="float" office:value="25" table:style-name="ce20">
            <text:p>25</text:p>
          </table:table-cell>
          <table:table-cell office:value-type="string" table:style-name="ce3">
            <text:p>3年体育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29]+1" table:style-name="ce5">
            <text:p>5</text:p>
          </table:table-cell>
          <table:table-cell office:value-type="float" office:value="20" table:formula="of:=[.BB29]*[.BD29]" table:style-name="ce5">
            <text:p>2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30]*[.E30]*0.86/[.D30]" table:style-name="ce5">
            <text:p>4.3</text:p>
          </table:table-cell>
          <table:table-cell office:value-type="float" office:value="8.6" table:formula="of:=[.D30]*[.E30]*0.86" table:style-name="ce5">
            <text:p>8.6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30]*[.L30]*0.8/[.K30]" table:style-name="ce5">
            <text:p>4</text:p>
          </table:table-cell>
          <table:table-cell office:value-type="float" office:value="8" table:formula="of:=[.K30]*[.L30]*0.8" table:style-name="ce5">
            <text:p>8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30]*[.S30]*0.43/[.R30]" table:style-name="ce5">
            <text:p>3.87</text:p>
          </table:table-cell>
          <table:table-cell office:value-type="float" office:value="7.74" table:formula="of:=[.R30]*[.S30]*0.43" table:style-name="ce23">
            <text:p>7.74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30]*[.S30]*0.4/[.R30]" table:style-name="ce5">
            <text:p>3.6</text:p>
          </table:table-cell>
          <table:table-cell office:value-type="float" office:value="7.2" table:formula="of:=[.R30]*[.S30]*0.4" table:style-name="ce5">
            <text:p>7.2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30]; [.$AG$54:.$AH$67]; 2; FALSE)" table:style-name="ce3">
            <text:p>4.2</text:p>
          </table:table-cell>
          <table:table-cell office:value-type="float" office:value="4.2" table:formula="of:=[.AH30]" table:style-name="ce23">
            <text:p>4.2</text:p>
          </table:table-cell>
          <table:table-cell office:value-type="float" office:value="8.4" table:formula="of:=[.AF30]*[.AI30]" table:style-name="ce5">
            <text:p>8.4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30]; [.$AO$54:.$AP$67]; 2; FALSE)" table:style-name="ce24">
            <text:p>3.9</text:p>
          </table:table-cell>
          <table:table-cell office:value-type="float" office:value="3.9" table:formula="of:=[.AP30]" table:style-name="ce5">
            <text:p>3.9</text:p>
          </table:table-cell>
          <table:table-cell office:value-type="float" office:value="7.8" table:formula="of:=[.AN30]*[.AQ30]" table:style-name="ce5">
            <text:p>7.8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30]*[.AW30]" table:style-name="ce5">
            <text:p>10</text:p>
          </table:table-cell>
          <table:table-cell table:style-name="ce1"/>
          <table:table-cell office:value-type="float" office:value="26" table:style-name="ce20">
            <text:p>26</text:p>
          </table:table-cell>
          <table:table-cell office:value-type="string" table:style-name="ce3">
            <text:p>1年芸術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30]+1" table:style-name="ce5">
            <text:p>4</text:p>
          </table:table-cell>
          <table:table-cell office:value-type="float" office:value="8" table:formula="of:=[.BB30]*[.BD30]" table:style-name="ce5">
            <text:p>8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31]*[.E31]*0.86/[.D31]" table:style-name="ce5">
            <text:p>3.44</text:p>
          </table:table-cell>
          <table:table-cell office:value-type="float" office:value="6.88" table:formula="of:=[.D31]*[.E31]*0.86" table:style-name="ce5">
            <text:p>6.88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31]*[.L31]*0.8/[.K31]" table:style-name="ce5">
            <text:p>3.2</text:p>
          </table:table-cell>
          <table:table-cell office:value-type="float" office:value="6.4" table:formula="of:=[.K31]*[.L31]*0.8" table:style-name="ce5">
            <text:p>6.4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31]*[.S31]*0.43/[.R31]" table:style-name="ce5">
            <text:p>3.44</text:p>
          </table:table-cell>
          <table:table-cell office:value-type="float" office:value="6.88" table:formula="of:=[.R31]*[.S31]*0.43" table:style-name="ce23">
            <text:p>6.88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31]*[.S31]*0.4/[.R31]" table:style-name="ce5">
            <text:p>3.2</text:p>
          </table:table-cell>
          <table:table-cell office:value-type="float" office:value="6.4" table:formula="of:=[.R31]*[.S31]*0.4" table:style-name="ce5">
            <text:p>6.4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31]; [.$AG$54:.$AH$67]; 2; FALSE)" table:style-name="ce3">
            <text:p>4</text:p>
          </table:table-cell>
          <table:table-cell office:value-type="float" office:value="4" table:formula="of:=[.AH31]" table:style-name="ce23">
            <text:p>4</text:p>
          </table:table-cell>
          <table:table-cell office:value-type="float" office:value="8" table:formula="of:=[.AF31]*[.AI31]" table:style-name="ce5">
            <text:p>8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31]; [.$AO$54:.$AP$67]; 2; FALSE)" table:style-name="ce24">
            <text:p>3.8</text:p>
          </table:table-cell>
          <table:table-cell office:value-type="float" office:value="3.8" table:formula="of:=[.AP31]" table:style-name="ce5">
            <text:p>3.8</text:p>
          </table:table-cell>
          <table:table-cell office:value-type="float" office:value="7.6" table:formula="of:=[.AN31]*[.AQ31]" table:style-name="ce5">
            <text:p>7.6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8" table:formula="of:=[.AV31]*[.AW31]" table:style-name="ce5">
            <text:p>8</text:p>
          </table:table-cell>
          <table:table-cell table:style-name="ce1"/>
          <table:table-cell office:value-type="float" office:value="27" table:style-name="ce20">
            <text:p>27</text:p>
          </table:table-cell>
          <table:table-cell office:value-type="string" table:style-name="ce3">
            <text:p>2年芸術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31]+1" table:style-name="ce5">
            <text:p>3</text:p>
          </table:table-cell>
          <table:table-cell office:value-type="float" office:value="6" table:formula="of:=[.BB31]*[.BD31]" table:style-name="ce5">
            <text:p>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32]*[.E32]*0.86/[.D32]" table:style-name="ce5">
            <text:p>4.3</text:p>
          </table:table-cell>
          <table:table-cell office:value-type="float" office:value="8.6" table:formula="of:=[.D32]*[.E32]*0.86" table:style-name="ce5">
            <text:p>8.6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32]*[.L32]*0.8/[.K32]" table:style-name="ce5">
            <text:p>4</text:p>
          </table:table-cell>
          <table:table-cell office:value-type="float" office:value="8" table:formula="of:=[.K32]*[.L32]*0.8" table:style-name="ce5">
            <text:p>8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32]*[.S32]*0.43/[.R32]" table:style-name="ce5">
            <text:p>3.01</text:p>
          </table:table-cell>
          <table:table-cell office:value-type="float" office:value="6.02" table:formula="of:=[.R32]*[.S32]*0.43" table:style-name="ce23">
            <text:p>6.02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32]*[.S32]*0.4/[.R32]" table:style-name="ce5">
            <text:p>2.8</text:p>
          </table:table-cell>
          <table:table-cell office:value-type="float" office:value="5.6000000000000005" table:formula="of:=[.R32]*[.S32]*0.4" table:style-name="ce5">
            <text:p>5.6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32]; [.$AG$54:.$AH$67]; 2; FALSE)" table:style-name="ce3">
            <text:p>3.8</text:p>
          </table:table-cell>
          <table:table-cell office:value-type="float" office:value="3.8" table:formula="of:=[.AH32]" table:style-name="ce23">
            <text:p>3.8</text:p>
          </table:table-cell>
          <table:table-cell office:value-type="float" office:value="7.6" table:formula="of:=[.AF32]*[.AI32]" table:style-name="ce5">
            <text:p>7.6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32]; [.$AO$54:.$AP$67]; 2; FALSE)" table:style-name="ce24">
            <text:p>3.7</text:p>
          </table:table-cell>
          <table:table-cell office:value-type="float" office:value="3.7" table:formula="of:=[.AP32]" table:style-name="ce5">
            <text:p>3.7</text:p>
          </table:table-cell>
          <table:table-cell office:value-type="float" office:value="7.4" table:formula="of:=[.AN32]*[.AQ32]" table:style-name="ce5">
            <text:p>7.4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32]*[.AW32]" table:style-name="ce5">
            <text:p>10</text:p>
          </table:table-cell>
          <table:table-cell table:style-name="ce1"/>
          <table:table-cell office:value-type="float" office:value="28" table:style-name="ce20">
            <text:p>28</text:p>
          </table:table-cell>
          <table:table-cell office:value-type="string" table:style-name="ce3">
            <text:p>3年芸術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32]+1" table:style-name="ce5">
            <text:p>5</text:p>
          </table:table-cell>
          <table:table-cell office:value-type="float" office:value="10" table:formula="of:=[.BB32]*[.BD32]" table:style-name="ce5">
            <text:p>1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33]*[.E33]*0.86/[.D33]" table:style-name="ce5">
            <text:p>4.3</text:p>
          </table:table-cell>
          <table:table-cell office:value-type="float" office:value="4.3" table:formula="of:=[.D33]*[.E33]*0.86" table:style-name="ce5">
            <text:p>4.3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33]*[.L33]*0.8/[.K33]" table:style-name="ce5">
            <text:p>4</text:p>
          </table:table-cell>
          <table:table-cell office:value-type="float" office:value="4" table:formula="of:=[.K33]*[.L33]*0.8" table:style-name="ce5">
            <text:p>4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33]*[.S33]*0.43/[.R33]" table:style-name="ce5">
            <text:p>4.3</text:p>
          </table:table-cell>
          <table:table-cell office:value-type="float" office:value="4.3" table:formula="of:=[.R33]*[.S33]*0.43" table:style-name="ce23">
            <text:p>4.3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33]*[.S33]*0.4/[.R33]" table:style-name="ce5">
            <text:p>4</text:p>
          </table:table-cell>
          <table:table-cell office:value-type="float" office:value="4" table:formula="of:=[.R33]*[.S33]*0.4" table:style-name="ce5">
            <text:p>4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33]; [.$AG$54:.$AH$67]; 2; FALSE)" table:style-name="ce3">
            <text:p>3.6</text:p>
          </table:table-cell>
          <table:table-cell office:value-type="float" office:value="3.6" table:formula="of:=[.AH33]" table:style-name="ce23">
            <text:p>3.6</text:p>
          </table:table-cell>
          <table:table-cell office:value-type="float" office:value="3.6" table:formula="of:=[.AF33]*[.AI33]" table:style-name="ce5">
            <text:p>3.6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33]; [.$AO$54:.$AP$67]; 2; FALSE)" table:style-name="ce24">
            <text:p>3.6</text:p>
          </table:table-cell>
          <table:table-cell office:value-type="float" office:value="3.6" table:formula="of:=[.AP33]" table:style-name="ce5">
            <text:p>3.6</text:p>
          </table:table-cell>
          <table:table-cell office:value-type="float" office:value="3.6" table:formula="of:=[.AN33]*[.AQ33]" table:style-name="ce5">
            <text:p>3.6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[.AV33]*[.AW33]" table:style-name="ce5">
            <text:p>5</text:p>
          </table:table-cell>
          <table:table-cell table:style-name="ce1"/>
          <table:table-cell office:value-type="float" office:value="29" table:style-name="ce20">
            <text:p>29</text:p>
          </table:table-cell>
          <table:table-cell office:value-type="string" table:style-name="ce3">
            <text:p>1年探求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33]+1" table:style-name="ce5">
            <text:p>4</text:p>
          </table:table-cell>
          <table:table-cell office:value-type="float" office:value="4" table:formula="of:=[.BB33]*[.BD33]" table:style-name="ce5">
            <text:p>4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34]*[.E34]*0.86/[.D34]" table:style-name="ce5">
            <text:p>4.3</text:p>
          </table:table-cell>
          <table:table-cell office:value-type="float" office:value="4.3" table:formula="of:=[.D34]*[.E34]*0.86" table:style-name="ce5">
            <text:p>4.3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34]*[.L34]*0.8/[.K34]" table:style-name="ce5">
            <text:p>4</text:p>
          </table:table-cell>
          <table:table-cell office:value-type="float" office:value="4" table:formula="of:=[.K34]*[.L34]*0.8" table:style-name="ce5">
            <text:p>4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34]*[.S34]*0.43/[.R34]" table:style-name="ce5">
            <text:p>3.87</text:p>
          </table:table-cell>
          <table:table-cell office:value-type="float" office:value="3.87" table:formula="of:=[.R34]*[.S34]*0.43" table:style-name="ce23">
            <text:p>3.87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34]*[.S34]*0.4/[.R34]" table:style-name="ce5">
            <text:p>3.6</text:p>
          </table:table-cell>
          <table:table-cell office:value-type="float" office:value="3.6" table:formula="of:=[.R34]*[.S34]*0.4" table:style-name="ce5">
            <text:p>3.6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34]; [.$AG$54:.$AH$67]; 2; FALSE)" table:style-name="ce3">
            <text:p>3.4</text:p>
          </table:table-cell>
          <table:table-cell office:value-type="float" office:value="3.4" table:formula="of:=[.AH34]" table:style-name="ce23">
            <text:p>3.4</text:p>
          </table:table-cell>
          <table:table-cell office:value-type="float" office:value="3.4" table:formula="of:=[.AF34]*[.AI34]" table:style-name="ce5">
            <text:p>3.4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34]; [.$AO$54:.$AP$67]; 2; FALSE)" table:style-name="ce24">
            <text:p>3.4</text:p>
          </table:table-cell>
          <table:table-cell office:value-type="float" office:value="3.4" table:formula="of:=[.AP34]" table:style-name="ce5">
            <text:p>3.4</text:p>
          </table:table-cell>
          <table:table-cell office:value-type="float" office:value="3.4" table:formula="of:=[.AN34]*[.AQ34]" table:style-name="ce5">
            <text:p>3.4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[.AV34]*[.AW34]" table:style-name="ce5">
            <text:p>5</text:p>
          </table:table-cell>
          <table:table-cell table:style-name="ce1"/>
          <table:table-cell office:value-type="float" office:value="30" table:style-name="ce20">
            <text:p>30</text:p>
          </table:table-cell>
          <table:table-cell office:value-type="string" table:style-name="ce3">
            <text:p>2年探求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34]+1" table:style-name="ce5">
            <text:p>3</text:p>
          </table:table-cell>
          <table:table-cell office:value-type="float" office:value="3" table:formula="of:=[.BB34]*[.BD34]" table:style-name="ce5">
            <text:p>3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35]*[.E35]*0.86/[.D35]" table:style-name="ce5">
            <text:p>4.3</text:p>
          </table:table-cell>
          <table:table-cell office:value-type="float" office:value="4.3" table:formula="of:=[.D35]*[.E35]*0.86" table:style-name="ce5">
            <text:p>4.3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35]*[.L35]*0.8/[.K35]" table:style-name="ce5">
            <text:p>4</text:p>
          </table:table-cell>
          <table:table-cell office:value-type="float" office:value="4" table:formula="of:=[.K35]*[.L35]*0.8" table:style-name="ce5">
            <text:p>4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35]*[.S35]*0.43/[.R35]" table:style-name="ce5">
            <text:p>3.44</text:p>
          </table:table-cell>
          <table:table-cell office:value-type="float" office:value="3.44" table:formula="of:=[.R35]*[.S35]*0.43" table:style-name="ce23">
            <text:p>3.44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35]*[.S35]*0.4/[.R35]" table:style-name="ce5">
            <text:p>3.2</text:p>
          </table:table-cell>
          <table:table-cell office:value-type="float" office:value="3.2" table:formula="of:=[.R35]*[.S35]*0.4" table:style-name="ce5">
            <text:p>3.2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35]; [.$AG$54:.$AH$67]; 2; FALSE)" table:style-name="ce3">
            <text:p>4.3</text:p>
          </table:table-cell>
          <table:table-cell office:value-type="float" office:value="4.3" table:formula="of:=[.AH35]" table:style-name="ce23">
            <text:p>4.3</text:p>
          </table:table-cell>
          <table:table-cell office:value-type="float" office:value="4.3" table:formula="of:=[.AF35]*[.AI35]" table:style-name="ce5">
            <text:p>4.3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35]; [.$AO$54:.$AP$67]; 2; FALSE)" table:style-name="ce24">
            <text:p>4</text:p>
          </table:table-cell>
          <table:table-cell office:value-type="float" office:value="4" table:formula="of:=[.AP35]" table:style-name="ce5">
            <text:p>4</text:p>
          </table:table-cell>
          <table:table-cell office:value-type="float" office:value="4" table:formula="of:=[.AN35]*[.AQ35]" table:style-name="ce5">
            <text:p>4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[.AV35]*[.AW35]" table:style-name="ce5">
            <text:p>5</text:p>
          </table:table-cell>
          <table:table-cell table:style-name="ce1"/>
          <table:table-cell office:value-type="float" office:value="31" table:style-name="ce20">
            <text:p>31</text:p>
          </table:table-cell>
          <table:table-cell office:value-type="string" table:style-name="ce3">
            <text:p>3年探求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35]+1" table:style-name="ce5">
            <text:p>5</text:p>
          </table:table-cell>
          <table:table-cell office:value-type="float" office:value="5" table:formula="of:=[.BB35]*[.BD35]" table:style-name="ce5">
            <text:p>5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36]*[.E36]*0.86/[.D36]" table:style-name="ce5">
            <text:p>2.58</text:p>
          </table:table-cell>
          <table:table-cell office:value-type="float" office:value="7.74" table:formula="of:=[.D36]*[.E36]*0.86" table:style-name="ce5">
            <text:p>7.74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.4" table:formula="of:=[.K36]*[.L36]*0.8/[.K36]" table:style-name="ce5">
            <text:p>2.4</text:p>
          </table:table-cell>
          <table:table-cell office:value-type="float" office:value="7.2" table:formula="of:=[.K36]*[.L36]*0.8" table:style-name="ce5">
            <text:p>7.2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36]*[.S36]*0.43/[.R36]" table:style-name="ce5">
            <text:p>3.01</text:p>
          </table:table-cell>
          <table:table-cell office:value-type="float" office:value="9.0299999999999994" table:formula="of:=[.R36]*[.S36]*0.43" table:style-name="ce23">
            <text:p>9.03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36]*[.S36]*0.4/[.R36]" table:style-name="ce5">
            <text:p>2.8</text:p>
          </table:table-cell>
          <table:table-cell office:value-type="float" office:value="8.4" table:formula="of:=[.R36]*[.S36]*0.4" table:style-name="ce5">
            <text:p>8.4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36]; [.$AG$54:.$AH$67]; 2; FALSE)" table:style-name="ce3">
            <text:p>4.2</text:p>
          </table:table-cell>
          <table:table-cell office:value-type="float" office:value="4.2" table:formula="of:=[.AH36]" table:style-name="ce23">
            <text:p>4.2</text:p>
          </table:table-cell>
          <table:table-cell office:value-type="float" office:value="12.600000000000001" table:formula="of:=[.AF36]*[.AI36]" table:style-name="ce5">
            <text:p>12.6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36]; [.$AO$54:.$AP$67]; 2; FALSE)" table:style-name="ce24">
            <text:p>3.9</text:p>
          </table:table-cell>
          <table:table-cell office:value-type="float" office:value="3.9" table:formula="of:=[.AP36]" table:style-name="ce5">
            <text:p>3.9</text:p>
          </table:table-cell>
          <table:table-cell office:value-type="float" office:value="11.7" table:formula="of:=[.AN36]*[.AQ36]" table:style-name="ce5">
            <text:p>11.7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9" table:formula="of:=[.AV36]*[.AW36]" table:style-name="ce5">
            <text:p>9</text:p>
          </table:table-cell>
          <table:table-cell table:style-name="ce1"/>
          <table:table-cell office:value-type="float" office:value="32" table:style-name="ce20">
            <text:p>32</text:p>
          </table:table-cell>
          <table:table-cell office:value-type="string" table:style-name="ce3">
            <text:p>1年情報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36]+1" table:style-name="ce5">
            <text:p>4</text:p>
          </table:table-cell>
          <table:table-cell office:value-type="float" office:value="12" table:formula="of:=[.BB36]*[.BD36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37]*[.E37]*0.86/[.D37]" table:style-name="ce5">
            <text:p>3.44</text:p>
          </table:table-cell>
          <table:table-cell office:value-type="float" office:value="10.32" table:formula="of:=[.D37]*[.E37]*0.86" table:style-name="ce5">
            <text:p>10.32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2000000000000006" table:formula="of:=[.K37]*[.L37]*0.8/[.K37]" table:style-name="ce5">
            <text:p>3.2</text:p>
          </table:table-cell>
          <table:table-cell office:value-type="float" office:value="9.6000000000000014" table:formula="of:=[.K37]*[.L37]*0.8" table:style-name="ce5">
            <text:p>9.6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37]*[.S37]*0.43/[.R37]" table:style-name="ce5">
            <text:p>4.3</text:p>
          </table:table-cell>
          <table:table-cell office:value-type="float" office:value="12.9" table:formula="of:=[.R37]*[.S37]*0.43" table:style-name="ce23">
            <text:p>12.9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37]*[.S37]*0.4/[.R37]" table:style-name="ce5">
            <text:p>4</text:p>
          </table:table-cell>
          <table:table-cell office:value-type="float" office:value="12" table:formula="of:=[.R37]*[.S37]*0.4" table:style-name="ce5">
            <text:p>12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37]; [.$AG$54:.$AH$67]; 2; FALSE)" table:style-name="ce3">
            <text:p>4</text:p>
          </table:table-cell>
          <table:table-cell office:value-type="float" office:value="4" table:formula="of:=[.AH37]" table:style-name="ce23">
            <text:p>4</text:p>
          </table:table-cell>
          <table:table-cell office:value-type="float" office:value="12" table:formula="of:=[.AF37]*[.AI37]" table:style-name="ce5">
            <text:p>12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37]; [.$AO$54:.$AP$67]; 2; FALSE)" table:style-name="ce24">
            <text:p>3.8</text:p>
          </table:table-cell>
          <table:table-cell office:value-type="float" office:value="3.8" table:formula="of:=[.AP37]" table:style-name="ce5">
            <text:p>3.8</text:p>
          </table:table-cell>
          <table:table-cell office:value-type="float" office:value="11.399999999999999" table:formula="of:=[.AN37]*[.AQ37]" table:style-name="ce5">
            <text:p>11.4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2" table:formula="of:=[.AV37]*[.AW37]" table:style-name="ce5">
            <text:p>12</text:p>
          </table:table-cell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3">
            <text:p>2年情報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37]+1" table:style-name="ce5">
            <text:p>3</text:p>
          </table:table-cell>
          <table:table-cell office:value-type="float" office:value="9" table:formula="of:=[.BB37]*[.BD37]" table:style-name="ce5">
            <text:p>9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38]*[.E38]*0.86/[.D38]" table:style-name="ce5">
            <text:p>3.44</text:p>
          </table:table-cell>
          <table:table-cell office:value-type="float" office:value="10.32" table:formula="of:=[.D38]*[.E38]*0.86" table:style-name="ce5">
            <text:p>10.32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2000000000000006" table:formula="of:=[.K38]*[.L38]*0.8/[.K38]" table:style-name="ce5">
            <text:p>3.2</text:p>
          </table:table-cell>
          <table:table-cell office:value-type="float" office:value="9.6000000000000014" table:formula="of:=[.K38]*[.L38]*0.8" table:style-name="ce5">
            <text:p>9.6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.8699999999999997" table:formula="of:=[.R38]*[.S38]*0.43/[.R38]" table:style-name="ce5">
            <text:p>3.87</text:p>
          </table:table-cell>
          <table:table-cell office:value-type="float" office:value="11.61" table:formula="of:=[.R38]*[.S38]*0.43" table:style-name="ce23">
            <text:p>11.61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38]*[.S38]*0.4/[.R38]" table:style-name="ce5">
            <text:p>3.6</text:p>
          </table:table-cell>
          <table:table-cell office:value-type="float" office:value="10.8" table:formula="of:=[.R38]*[.S38]*0.4" table:style-name="ce5">
            <text:p>10.8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38]; [.$AG$54:.$AH$67]; 2; FALSE)" table:style-name="ce3">
            <text:p>3.8</text:p>
          </table:table-cell>
          <table:table-cell office:value-type="float" office:value="3.8" table:formula="of:=[.AH38]" table:style-name="ce23">
            <text:p>3.8</text:p>
          </table:table-cell>
          <table:table-cell office:value-type="float" office:value="11.399999999999999" table:formula="of:=[.AF38]*[.AI38]" table:style-name="ce5">
            <text:p>11.4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38]; [.$AO$54:.$AP$67]; 2; FALSE)" table:style-name="ce24">
            <text:p>3.7</text:p>
          </table:table-cell>
          <table:table-cell office:value-type="float" office:value="3.7" table:formula="of:=[.AP38]" table:style-name="ce5">
            <text:p>3.7</text:p>
          </table:table-cell>
          <table:table-cell office:value-type="float" office:value="11.100000000000001" table:formula="of:=[.AN38]*[.AQ38]" table:style-name="ce5">
            <text:p>11.1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2" table:formula="of:=[.AV38]*[.AW38]" table:style-name="ce5">
            <text:p>12</text:p>
          </table:table-cell>
          <table:table-cell table:style-name="ce1"/>
          <table:table-cell office:value-type="float" office:value="34" table:style-name="ce20">
            <text:p>34</text:p>
          </table:table-cell>
          <table:table-cell office:value-type="string" table:style-name="ce3">
            <text:p>3年情報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38]+1" table:style-name="ce5">
            <text:p>5</text:p>
          </table:table-cell>
          <table:table-cell office:value-type="float" office:value="15" table:formula="of:=[.BB38]*[.BD38]" table:style-name="ce5">
            <text:p>15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.58" table:formula="of:=[.D39]*[.E39]*0.86/[.D39]" table:style-name="ce5">
            <text:p>2.58</text:p>
          </table:table-cell>
          <table:table-cell office:value-type="float" office:value="10.32" table:formula="of:=[.D39]*[.E39]*0.86" table:style-name="ce5">
            <text:p>10.32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.4000000000000004" table:formula="of:=[.K39]*[.L39]*0.8/[.K39]" table:style-name="ce5">
            <text:p>2.4</text:p>
          </table:table-cell>
          <table:table-cell office:value-type="float" office:value="9.6000000000000014" table:formula="of:=[.K39]*[.L39]*0.8" table:style-name="ce5">
            <text:p>9.6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39]*[.S39]*0.43/[.R39]" table:style-name="ce5">
            <text:p>3.44</text:p>
          </table:table-cell>
          <table:table-cell office:value-type="float" office:value="13.76" table:formula="of:=[.R39]*[.S39]*0.43" table:style-name="ce23">
            <text:p>13.76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39]*[.S39]*0.4/[.R39]" table:style-name="ce5">
            <text:p>3.2</text:p>
          </table:table-cell>
          <table:table-cell office:value-type="float" office:value="12.8" table:formula="of:=[.R39]*[.S39]*0.4" table:style-name="ce5">
            <text:p>12.8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39]; [.$AG$54:.$AH$67]; 2; FALSE)" table:style-name="ce3">
            <text:p>3.6</text:p>
          </table:table-cell>
          <table:table-cell office:value-type="float" office:value="3.6" table:formula="of:=[.AH39]" table:style-name="ce23">
            <text:p>3.6</text:p>
          </table:table-cell>
          <table:table-cell office:value-type="float" office:value="14.4" table:formula="of:=[.AF39]*[.AI39]" table:style-name="ce5">
            <text:p>14.4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39]; [.$AO$54:.$AP$67]; 2; FALSE)" table:style-name="ce24">
            <text:p>3.6</text:p>
          </table:table-cell>
          <table:table-cell office:value-type="float" office:value="3.6" table:formula="of:=[.AP39]" table:style-name="ce5">
            <text:p>3.6</text:p>
          </table:table-cell>
          <table:table-cell office:value-type="float" office:value="14.4" table:formula="of:=[.AN39]*[.AQ39]" table:style-name="ce5">
            <text:p>14.4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2" table:formula="of:=[.AV39]*[.AW39]" table:style-name="ce5">
            <text:p>12</text:p>
          </table:table-cell>
          <table:table-cell table:style-name="ce1"/>
          <table:table-cell office:value-type="float" office:value="35" table:style-name="ce20">
            <text:p>35</text:p>
          </table:table-cell>
          <table:table-cell office:value-type="string" table:style-name="ce3">
            <text:p>1年世界史B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39]+1" table:style-name="ce5">
            <text:p>4</text:p>
          </table:table-cell>
          <table:table-cell office:value-type="float" office:value="16" table:formula="of:=[.BB39]*[.BD39]" table:style-name="ce5">
            <text:p>1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40]*[.E40]*0.86/[.D40]" table:style-name="ce5">
            <text:p>3.44</text:p>
          </table:table-cell>
          <table:table-cell office:value-type="float" office:value="13.76" table:formula="of:=[.D40]*[.E40]*0.86" table:style-name="ce5">
            <text:p>13.76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2" table:formula="of:=[.K40]*[.L40]*0.8/[.K40]" table:style-name="ce5">
            <text:p>3.2</text:p>
          </table:table-cell>
          <table:table-cell office:value-type="float" office:value="12.8" table:formula="of:=[.K40]*[.L40]*0.8" table:style-name="ce5">
            <text:p>12.8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40]*[.S40]*0.43/[.R40]" table:style-name="ce5">
            <text:p>3.01</text:p>
          </table:table-cell>
          <table:table-cell office:value-type="float" office:value="12.04" table:formula="of:=[.R40]*[.S40]*0.43" table:style-name="ce23">
            <text:p>12.04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40]*[.S40]*0.4/[.R40]" table:style-name="ce5">
            <text:p>2.8</text:p>
          </table:table-cell>
          <table:table-cell office:value-type="float" office:value="11.200000000000001" table:formula="of:=[.R40]*[.S40]*0.4" table:style-name="ce5">
            <text:p>11.2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40]; [.$AG$54:.$AH$67]; 2; FALSE)" table:style-name="ce3">
            <text:p>3.4</text:p>
          </table:table-cell>
          <table:table-cell office:value-type="float" office:value="3.4" table:formula="of:=[.AH40]" table:style-name="ce23">
            <text:p>3.4</text:p>
          </table:table-cell>
          <table:table-cell office:value-type="float" office:value="13.6" table:formula="of:=[.AF40]*[.AI40]" table:style-name="ce5">
            <text:p>13.6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40]; [.$AO$54:.$AP$67]; 2; FALSE)" table:style-name="ce24">
            <text:p>3.4</text:p>
          </table:table-cell>
          <table:table-cell office:value-type="float" office:value="3.4" table:formula="of:=[.AP40]" table:style-name="ce5">
            <text:p>3.4</text:p>
          </table:table-cell>
          <table:table-cell office:value-type="float" office:value="13.6" table:formula="of:=[.AN40]*[.AQ40]" table:style-name="ce5">
            <text:p>13.6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formula="of:=[.AV40]*[.AW40]" table:style-name="ce5">
            <text:p>16</text:p>
          </table:table-cell>
          <table:table-cell table:style-name="ce1"/>
          <table:table-cell office:value-type="float" office:value="36" table:style-name="ce20">
            <text:p>36</text:p>
          </table:table-cell>
          <table:table-cell office:value-type="string" table:style-name="ce3">
            <text:p>2年世界史B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40]+1" table:style-name="ce5">
            <text:p>3</text:p>
          </table:table-cell>
          <table:table-cell office:value-type="float" office:value="12" table:formula="of:=[.BB40]*[.BD40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44" table:formula="of:=[.D41]*[.E41]*0.86/[.D41]" table:style-name="ce5">
            <text:p>3.44</text:p>
          </table:table-cell>
          <table:table-cell office:value-type="float" office:value="20.64" table:formula="of:=[.D41]*[.E41]*0.86" table:style-name="ce5">
            <text:p>20.64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3.2000000000000006" table:formula="of:=[.K41]*[.L41]*0.8/[.K41]" table:style-name="ce5">
            <text:p>3.2</text:p>
          </table:table-cell>
          <table:table-cell office:value-type="float" office:value="19.200000000000003" table:formula="of:=[.K41]*[.L41]*0.8" table:style-name="ce5">
            <text:p>19.2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41]*[.S41]*0.43/[.R41]" table:style-name="ce5">
            <text:p>4.3</text:p>
          </table:table-cell>
          <table:table-cell office:value-type="float" office:value="25.8" table:formula="of:=[.R41]*[.S41]*0.43" table:style-name="ce23">
            <text:p>25.8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41]*[.S41]*0.4/[.R41]" table:style-name="ce5">
            <text:p>4</text:p>
          </table:table-cell>
          <table:table-cell office:value-type="float" office:value="24" table:formula="of:=[.R41]*[.S41]*0.4" table:style-name="ce5">
            <text:p>24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41]; [.$AG$54:.$AH$67]; 2; FALSE)" table:style-name="ce3">
            <text:p>4.3</text:p>
          </table:table-cell>
          <table:table-cell office:value-type="float" office:value="4.3" table:formula="of:=[.AH41]" table:style-name="ce23">
            <text:p>4.3</text:p>
          </table:table-cell>
          <table:table-cell office:value-type="float" office:value="25.799999999999997" table:formula="of:=[.AF41]*[.AI41]" table:style-name="ce5">
            <text:p>25.8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41]; [.$AO$54:.$AP$67]; 2; FALSE)" table:style-name="ce24">
            <text:p>4</text:p>
          </table:table-cell>
          <table:table-cell office:value-type="float" office:value="4" table:formula="of:=[.AP41]" table:style-name="ce5">
            <text:p>4</text:p>
          </table:table-cell>
          <table:table-cell office:value-type="float" office:value="24" table:formula="of:=[.AN41]*[.AQ41]" table:style-name="ce5">
            <text:p>24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4" table:formula="of:=[.AV41]*[.AW41]" table:style-name="ce5">
            <text:p>24</text:p>
          </table:table-cell>
          <table:table-cell table:style-name="ce1"/>
          <table:table-cell office:value-type="float" office:value="37" table:style-name="ce20">
            <text:p>37</text:p>
          </table:table-cell>
          <table:table-cell office:value-type="string" table:style-name="ce3">
            <text:p>3年世界史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41]+1" table:style-name="ce5">
            <text:p>5</text:p>
          </table:table-cell>
          <table:table-cell office:value-type="float" office:value="30" table:formula="of:=[.BB41]*[.BD41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2]*[.E42]*0.86/[.D42]" table:style-name="ce5">
            <text:p>4.3</text:p>
          </table:table-cell>
          <table:table-cell office:value-type="float" office:value="17.2" table:formula="of:=[.D42]*[.E42]*0.86" table:style-name="ce5">
            <text:p>17.2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2]*[.L42]*0.8/[.K42]" table:style-name="ce5">
            <text:p>4</text:p>
          </table:table-cell>
          <table:table-cell office:value-type="float" office:value="16" table:formula="of:=[.K42]*[.L42]*0.8" table:style-name="ce5">
            <text:p>16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3.87" table:formula="of:=[.R42]*[.S42]*0.43/[.R42]" table:style-name="ce5">
            <text:p>3.87</text:p>
          </table:table-cell>
          <table:table-cell office:value-type="float" office:value="15.48" table:formula="of:=[.R42]*[.S42]*0.43" table:style-name="ce23">
            <text:p>15.48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42]*[.S42]*0.4/[.R42]" table:style-name="ce5">
            <text:p>3.6</text:p>
          </table:table-cell>
          <table:table-cell office:value-type="float" office:value="14.4" table:formula="of:=[.R42]*[.S42]*0.4" table:style-name="ce5">
            <text:p>14.4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42]; [.$AG$54:.$AH$67]; 2; FALSE)" table:style-name="ce3">
            <text:p>4.2</text:p>
          </table:table-cell>
          <table:table-cell office:value-type="float" office:value="4.2" table:formula="of:=[.AH42]" table:style-name="ce23">
            <text:p>4.2</text:p>
          </table:table-cell>
          <table:table-cell office:value-type="float" office:value="16.8" table:formula="of:=[.AF42]*[.AI42]" table:style-name="ce5">
            <text:p>16.8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42]; [.$AO$54:.$AP$67]; 2; FALSE)" table:style-name="ce24">
            <text:p>3.9</text:p>
          </table:table-cell>
          <table:table-cell office:value-type="float" office:value="3.9" table:formula="of:=[.AP42]" table:style-name="ce5">
            <text:p>3.9</text:p>
          </table:table-cell>
          <table:table-cell office:value-type="float" office:value="15.6" table:formula="of:=[.AN42]*[.AQ42]" table:style-name="ce5">
            <text:p>15.6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0" table:formula="of:=[.AV42]*[.AW42]" table:style-name="ce5">
            <text:p>20</text:p>
          </table:table-cell>
          <table:table-cell table:style-name="ce1"/>
          <table:table-cell office:value-type="float" office:value="38" table:style-name="ce20">
            <text:p>38</text:p>
          </table:table-cell>
          <table:table-cell office:value-type="string" table:style-name="ce3">
            <text:p>1年日本史B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42]+1" table:style-name="ce5">
            <text:p>4</text:p>
          </table:table-cell>
          <table:table-cell office:value-type="float" office:value="16" table:formula="of:=[.BB42]*[.BD42]" table:style-name="ce5">
            <text:p>16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3]*[.E43]*0.86/[.D43]" table:style-name="ce5">
            <text:p>4.3</text:p>
          </table:table-cell>
          <table:table-cell office:value-type="float" office:value="17.2" table:formula="of:=[.D43]*[.E43]*0.86" table:style-name="ce5">
            <text:p>17.2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3]*[.L43]*0.8/[.K43]" table:style-name="ce5">
            <text:p>4</text:p>
          </table:table-cell>
          <table:table-cell office:value-type="float" office:value="16" table:formula="of:=[.K43]*[.L43]*0.8" table:style-name="ce5">
            <text:p>16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43]*[.S43]*0.43/[.R43]" table:style-name="ce5">
            <text:p>3.44</text:p>
          </table:table-cell>
          <table:table-cell office:value-type="float" office:value="13.76" table:formula="of:=[.R43]*[.S43]*0.43" table:style-name="ce23">
            <text:p>13.76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43]*[.S43]*0.4/[.R43]" table:style-name="ce5">
            <text:p>3.2</text:p>
          </table:table-cell>
          <table:table-cell office:value-type="float" office:value="12.8" table:formula="of:=[.R43]*[.S43]*0.4" table:style-name="ce5">
            <text:p>12.8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43]; [.$AG$54:.$AH$67]; 2; FALSE)" table:style-name="ce3">
            <text:p>4</text:p>
          </table:table-cell>
          <table:table-cell office:value-type="float" office:value="4" table:formula="of:=[.AH43]" table:style-name="ce23">
            <text:p>4</text:p>
          </table:table-cell>
          <table:table-cell office:value-type="float" office:value="16" table:formula="of:=[.AF43]*[.AI43]" table:style-name="ce5">
            <text:p>16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43]; [.$AO$54:.$AP$67]; 2; FALSE)" table:style-name="ce24">
            <text:p>3.8</text:p>
          </table:table-cell>
          <table:table-cell office:value-type="float" office:value="3.8" table:formula="of:=[.AP43]" table:style-name="ce5">
            <text:p>3.8</text:p>
          </table:table-cell>
          <table:table-cell office:value-type="float" office:value="15.2" table:formula="of:=[.AN43]*[.AQ43]" table:style-name="ce5">
            <text:p>15.2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0" table:formula="of:=[.AV43]*[.AW43]" table:style-name="ce5">
            <text:p>20</text:p>
          </table:table-cell>
          <table:table-cell table:style-name="ce1"/>
          <table:table-cell office:value-type="float" office:value="39" table:style-name="ce20">
            <text:p>39</text:p>
          </table:table-cell>
          <table:table-cell office:value-type="string" table:style-name="ce3">
            <text:p>2年日本史B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43]+1" table:style-name="ce5">
            <text:p>3</text:p>
          </table:table-cell>
          <table:table-cell office:value-type="float" office:value="12" table:formula="of:=[.BB43]*[.BD43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4]*[.E44]*0.86/[.D44]" table:style-name="ce5">
            <text:p>4.3</text:p>
          </table:table-cell>
          <table:table-cell office:value-type="float" office:value="25.8" table:formula="of:=[.D44]*[.E44]*0.86" table:style-name="ce5">
            <text:p>25.8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4]*[.L44]*0.8/[.K44]" table:style-name="ce5">
            <text:p>4</text:p>
          </table:table-cell>
          <table:table-cell office:value-type="float" office:value="24" table:formula="of:=[.K44]*[.L44]*0.8" table:style-name="ce5">
            <text:p>24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44]*[.S44]*0.43/[.R44]" table:style-name="ce5">
            <text:p>3.01</text:p>
          </table:table-cell>
          <table:table-cell office:value-type="float" office:value="18.059999999999999" table:formula="of:=[.R44]*[.S44]*0.43" table:style-name="ce23">
            <text:p>18.06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44]*[.S44]*0.4/[.R44]" table:style-name="ce5">
            <text:p>2.8</text:p>
          </table:table-cell>
          <table:table-cell office:value-type="float" office:value="16.8" table:formula="of:=[.R44]*[.S44]*0.4" table:style-name="ce5">
            <text:p>16.8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8" table:formula="of:=VLOOKUP([.AG44]; [.$AG$54:.$AH$67]; 2; FALSE)" table:style-name="ce3">
            <text:p>3.8</text:p>
          </table:table-cell>
          <table:table-cell office:value-type="float" office:value="3.8" table:formula="of:=[.AH44]" table:style-name="ce23">
            <text:p>3.8</text:p>
          </table:table-cell>
          <table:table-cell office:value-type="float" office:value="22.799999999999997" table:formula="of:=[.AF44]*[.AI44]" table:style-name="ce5">
            <text:p>22.8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string" table:style-name="ce24">
            <text:p>B+</text:p>
          </table:table-cell>
          <table:table-cell office:value-type="float" office:value="3.7" table:formula="of:=VLOOKUP([.AG44]; [.$AO$54:.$AP$67]; 2; FALSE)" table:style-name="ce24">
            <text:p>3.7</text:p>
          </table:table-cell>
          <table:table-cell office:value-type="float" office:value="3.7" table:formula="of:=[.AP44]" table:style-name="ce5">
            <text:p>3.7</text:p>
          </table:table-cell>
          <table:table-cell office:value-type="float" office:value="22.200000000000003" table:formula="of:=[.AN44]*[.AQ44]" table:style-name="ce5">
            <text:p>22.2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30" table:formula="of:=[.AV44]*[.AW44]" table:style-name="ce5">
            <text:p>30</text:p>
          </table:table-cell>
          <table:table-cell table:style-name="ce1"/>
          <table:table-cell office:value-type="float" office:value="40" table:style-name="ce20">
            <text:p>40</text:p>
          </table:table-cell>
          <table:table-cell office:value-type="string" table:style-name="ce3">
            <text:p>3年日本史B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44]+1" table:style-name="ce5">
            <text:p>5</text:p>
          </table:table-cell>
          <table:table-cell office:value-type="float" office:value="30" table:formula="of:=[.BB44]*[.BD44]" table:style-name="ce5">
            <text:p>3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5]*[.E45]*0.86/[.D45]" table:style-name="ce5">
            <text:p>4.3</text:p>
          </table:table-cell>
          <table:table-cell office:value-type="float" office:value="12.9" table:formula="of:=[.D45]*[.E45]*0.86" table:style-name="ce5">
            <text:p>12.9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5]*[.L45]*0.8/[.K45]" table:style-name="ce5">
            <text:p>4</text:p>
          </table:table-cell>
          <table:table-cell office:value-type="float" office:value="12" table:formula="of:=[.K45]*[.L45]*0.8" table:style-name="ce5">
            <text:p>12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4.3" table:formula="of:=[.R45]*[.S45]*0.43/[.R45]" table:style-name="ce5">
            <text:p>4.3</text:p>
          </table:table-cell>
          <table:table-cell office:value-type="float" office:value="12.9" table:formula="of:=[.R45]*[.S45]*0.43" table:style-name="ce23">
            <text:p>12.9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4" table:formula="of:=[.R45]*[.S45]*0.4/[.R45]" table:style-name="ce5">
            <text:p>4</text:p>
          </table:table-cell>
          <table:table-cell office:value-type="float" office:value="12" table:formula="of:=[.R45]*[.S45]*0.4" table:style-name="ce5">
            <text:p>12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45]; [.$AG$54:.$AH$67]; 2; FALSE)" table:style-name="ce3">
            <text:p>3.6</text:p>
          </table:table-cell>
          <table:table-cell office:value-type="float" office:value="3.6" table:formula="of:=[.AH45]" table:style-name="ce23">
            <text:p>3.6</text:p>
          </table:table-cell>
          <table:table-cell office:value-type="float" office:value="10.8" table:formula="of:=[.AF45]*[.AI45]" table:style-name="ce5">
            <text:p>10.8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</text:p>
          </table:table-cell>
          <table:table-cell office:value-type="float" office:value="3.6" table:formula="of:=VLOOKUP([.AG45]; [.$AO$54:.$AP$67]; 2; FALSE)" table:style-name="ce24">
            <text:p>3.6</text:p>
          </table:table-cell>
          <table:table-cell office:value-type="float" office:value="3.6" table:formula="of:=[.AP45]" table:style-name="ce5">
            <text:p>3.6</text:p>
          </table:table-cell>
          <table:table-cell office:value-type="float" office:value="10.8" table:formula="of:=[.AN45]*[.AQ45]" table:style-name="ce5">
            <text:p>10.8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5" table:formula="of:=[.AV45]*[.AW45]" table:style-name="ce5">
            <text:p>15</text:p>
          </table:table-cell>
          <table:table-cell table:style-name="ce1"/>
          <table:table-cell office:value-type="float" office:value="41" table:style-name="ce20">
            <text:p>41</text:p>
          </table:table-cell>
          <table:table-cell office:value-type="string" table:style-name="ce3">
            <text:p>倫理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45]+1" table:style-name="ce5">
            <text:p>4</text:p>
          </table:table-cell>
          <table:table-cell office:value-type="float" office:value="12" table:formula="of:=[.BB45]*[.BD45]" table:style-name="ce5">
            <text:p>12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6]*[.E46]*0.86/[.D46]" table:style-name="ce5">
            <text:p>4.3</text:p>
          </table:table-cell>
          <table:table-cell office:value-type="float" office:value="12.9" table:formula="of:=[.D46]*[.E46]*0.86" table:style-name="ce5">
            <text:p>12.9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6]*[.L46]*0.8/[.K46]" table:style-name="ce5">
            <text:p>4</text:p>
          </table:table-cell>
          <table:table-cell office:value-type="float" office:value="12" table:formula="of:=[.K46]*[.L46]*0.8" table:style-name="ce5">
            <text:p>12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.8699999999999997" table:formula="of:=[.R46]*[.S46]*0.43/[.R46]" table:style-name="ce5">
            <text:p>3.87</text:p>
          </table:table-cell>
          <table:table-cell office:value-type="float" office:value="11.61" table:formula="of:=[.R46]*[.S46]*0.43" table:style-name="ce23">
            <text:p>11.61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.6" table:formula="of:=[.R46]*[.S46]*0.4/[.R46]" table:style-name="ce5">
            <text:p>3.6</text:p>
          </table:table-cell>
          <table:table-cell office:value-type="float" office:value="10.8" table:formula="of:=[.R46]*[.S46]*0.4" table:style-name="ce5">
            <text:p>10.8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46]; [.$AG$54:.$AH$67]; 2; FALSE)" table:style-name="ce3">
            <text:p>3.4</text:p>
          </table:table-cell>
          <table:table-cell office:value-type="float" office:value="3.4" table:formula="of:=[.AH46]" table:style-name="ce23">
            <text:p>3.4</text:p>
          </table:table-cell>
          <table:table-cell office:value-type="float" office:value="10.199999999999999" table:formula="of:=[.AF46]*[.AI46]" table:style-name="ce5">
            <text:p>10.2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B-</text:p>
          </table:table-cell>
          <table:table-cell office:value-type="float" office:value="3.4" table:formula="of:=VLOOKUP([.AG46]; [.$AO$54:.$AP$67]; 2; FALSE)" table:style-name="ce24">
            <text:p>3.4</text:p>
          </table:table-cell>
          <table:table-cell office:value-type="float" office:value="3.4" table:formula="of:=[.AP46]" table:style-name="ce5">
            <text:p>3.4</text:p>
          </table:table-cell>
          <table:table-cell office:value-type="float" office:value="10.199999999999999" table:formula="of:=[.AN46]*[.AQ46]" table:style-name="ce5">
            <text:p>10.2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5" table:formula="of:=[.AV46]*[.AW46]" table:style-name="ce5">
            <text:p>15</text:p>
          </table:table-cell>
          <table:table-cell table:style-name="ce1"/>
          <table:table-cell office:value-type="float" office:value="42" table:style-name="ce20">
            <text:p>42</text:p>
          </table:table-cell>
          <table:table-cell office:value-type="string" table:style-name="ce3">
            <text:p>政治経済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formula="of:=[.BC46]+1" table:style-name="ce5">
            <text:p>3</text:p>
          </table:table-cell>
          <table:table-cell office:value-type="float" office:value="9" table:formula="of:=[.BB46]*[.BD46]" table:style-name="ce5">
            <text:p>9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7]*[.E47]*0.86/[.D47]" table:style-name="ce5">
            <text:p>4.3</text:p>
          </table:table-cell>
          <table:table-cell office:value-type="float" office:value="8.6" table:formula="of:=[.D47]*[.E47]*0.86" table:style-name="ce5">
            <text:p>8.6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7]*[.L47]*0.8/[.K47]" table:style-name="ce5">
            <text:p>4</text:p>
          </table:table-cell>
          <table:table-cell office:value-type="float" office:value="8" table:formula="of:=[.K47]*[.L47]*0.8" table:style-name="ce5">
            <text:p>8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3.44" table:formula="of:=[.R47]*[.S47]*0.43/[.R47]" table:style-name="ce5">
            <text:p>3.44</text:p>
          </table:table-cell>
          <table:table-cell office:value-type="float" office:value="6.88" table:formula="of:=[.R47]*[.S47]*0.43" table:style-name="ce23">
            <text:p>6.88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3.2" table:formula="of:=[.R47]*[.S47]*0.4/[.R47]" table:style-name="ce5">
            <text:p>3.2</text:p>
          </table:table-cell>
          <table:table-cell office:value-type="float" office:value="6.4" table:formula="of:=[.R47]*[.S47]*0.4" table:style-name="ce5">
            <text:p>6.4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+</text:p>
          </table:table-cell>
          <table:table-cell office:value-type="float" office:value="4.3" table:formula="of:=VLOOKUP([.AG47]; [.$AG$54:.$AH$67]; 2; FALSE)" table:style-name="ce3">
            <text:p>4.3</text:p>
          </table:table-cell>
          <table:table-cell office:value-type="float" office:value="4.3" table:formula="of:=[.AH47]" table:style-name="ce23">
            <text:p>4.3</text:p>
          </table:table-cell>
          <table:table-cell office:value-type="float" office:value="8.6" table:formula="of:=[.AF47]*[.AI47]" table:style-name="ce5">
            <text:p>8.6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A+</text:p>
          </table:table-cell>
          <table:table-cell office:value-type="float" office:value="4" table:formula="of:=VLOOKUP([.AG47]; [.$AO$54:.$AP$67]; 2; FALSE)" table:style-name="ce24">
            <text:p>4</text:p>
          </table:table-cell>
          <table:table-cell office:value-type="float" office:value="4" table:formula="of:=[.AP47]" table:style-name="ce5">
            <text:p>4</text:p>
          </table:table-cell>
          <table:table-cell office:value-type="float" office:value="8" table:formula="of:=[.AN47]*[.AQ47]" table:style-name="ce5">
            <text:p>8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0" table:formula="of:=[.AV47]*[.AW47]" table:style-name="ce5">
            <text:p>10</text:p>
          </table:table-cell>
          <table:table-cell table:style-name="ce1"/>
          <table:table-cell office:value-type="float" office:value="43" table:style-name="ce20">
            <text:p>43</text:p>
          </table:table-cell>
          <table:table-cell office:value-type="string" table:style-name="ce3">
            <text:p>家庭科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BC47]+1" table:style-name="ce5">
            <text:p>5</text:p>
          </table:table-cell>
          <table:table-cell office:value-type="float" office:value="10" table:formula="of:=[.BB47]*[.BD47]" table:style-name="ce5">
            <text:p>10</text:p>
          </table:table-cell>
          <table:table-cell table:number-columns-repeated="16327"/>
        </table:table-row>
        <table:table-row table:style-name="ro2">
          <table:table-cell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.3" table:formula="of:=[.D48]*[.E48]*0.86/[.D48]" table:style-name="ce5">
            <text:p>4.3</text:p>
          </table:table-cell>
          <table:table-cell office:value-type="float" office:value="4.3" table:formula="of:=[.D48]*[.E48]*0.86" table:style-name="ce5">
            <text:p>4.3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K48]*[.L48]*0.8/[.K48]" table:style-name="ce5">
            <text:p>4</text:p>
          </table:table-cell>
          <table:table-cell office:value-type="float" office:value="4" table:formula="of:=[.K48]*[.L48]*0.8" table:style-name="ce5">
            <text:p>4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3.01" table:formula="of:=[.R48]*[.S48]*0.43/[.R48]" table:style-name="ce5">
            <text:p>3.01</text:p>
          </table:table-cell>
          <table:table-cell office:value-type="float" office:value="3.01" table:formula="of:=[.R48]*[.S48]*0.43" table:style-name="ce23">
            <text:p>3.01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R48]*[.S48]*0.4/[.R48]" table:style-name="ce5">
            <text:p>2.8</text:p>
          </table:table-cell>
          <table:table-cell office:value-type="float" office:value="2.8000000000000003" table:formula="of:=[.R48]*[.S48]*0.4" table:style-name="ce5">
            <text:p>2.8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A</text:p>
          </table:table-cell>
          <table:table-cell office:value-type="float" office:value="4.2" table:formula="of:=VLOOKUP([.AG48]; [.$AG$54:.$AH$67]; 2; FALSE)" table:style-name="ce6">
            <text:p>4.2</text:p>
          </table:table-cell>
          <table:table-cell office:value-type="float" office:value="4.2" table:formula="of:=[.AH48]" table:style-name="ce23">
            <text:p>4.2</text:p>
          </table:table-cell>
          <table:table-cell office:value-type="float" office:value="4.2" table:formula="of:=[.AF48]*[.AI48]" table:style-name="ce5">
            <text:p>4.2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A</text:p>
          </table:table-cell>
          <table:table-cell office:value-type="float" office:value="3.9" table:formula="of:=VLOOKUP([.AG48]; [.$AO$54:.$AP$67]; 2; FALSE)" table:style-name="ce24">
            <text:p>3.9</text:p>
          </table:table-cell>
          <table:table-cell office:value-type="float" office:value="3.9" table:formula="of:=[.AP48]" table:style-name="ce5">
            <text:p>3.9</text:p>
          </table:table-cell>
          <table:table-cell office:value-type="float" office:value="3.9" table:formula="of:=[.AN48]*[.AQ48]" table:style-name="ce5">
            <text:p>3.9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[.AV48]*[.AW48]" table:style-name="ce5">
            <text:p>5</text:p>
          </table:table-cell>
          <table:table-cell table:style-name="ce1"/>
          <table:table-cell office:value-type="float" office:value="44" table:style-name="ce20">
            <text:p>44</text:p>
          </table:table-cell>
          <table:table-cell office:value-type="string" table:style-name="ce6">
            <text:p>特別活動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C48]+1" table:style-name="ce5">
            <text:p>4</text:p>
          </table:table-cell>
          <table:table-cell office:value-type="float" office:value="4" table:formula="of:=[.BB48]*[.BD48]" table:style-name="ce5">
            <text:p>4</text:p>
          </table:table-cell>
          <table:table-cell table:number-columns-repeated="16327"/>
        </table:table-row>
        <table:table-row table:style-name="ro1">
          <table:table-cell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4.3" table:formula="of:=[.D49]*[.E49]*0.86/[.D49]" table:style-name="ce5">
            <text:p>4.3</text:p>
          </table:table-cell>
          <table:table-cell office:value-type="float" office:value="4.3" table:formula="of:=[.D49]*[.E49]*0.86" table:style-name="ce5">
            <text:p>4.3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[.K49]*[.L49]*0.8/[.K49]" table:style-name="ce5">
            <text:p>4</text:p>
          </table:table-cell>
          <table:table-cell office:value-type="float" office:value="4" table:formula="of:=[.K49]*[.L49]*0.8" table:style-name="ce5">
            <text:p>4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4.3" table:formula="of:=[.R49]*[.S49]*0.43/[.R49]" table:style-name="ce5">
            <text:p>4.3</text:p>
          </table:table-cell>
          <table:table-cell office:value-type="float" office:value="4.3" table:formula="of:=[.R49]*[.S49]*0.43" table:style-name="ce23">
            <text:p>4.3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[.R49]*[.S49]*0.4/[.R49]" table:style-name="ce5">
            <text:p>4</text:p>
          </table:table-cell>
          <table:table-cell office:value-type="float" office:value="4" table:formula="of:=[.R49]*[.S49]*0.4" table:style-name="ce5">
            <text:p>4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string" table:style-name="ce24">
            <text:p>A-</text:p>
          </table:table-cell>
          <table:table-cell office:value-type="float" office:value="4" table:formula="of:=VLOOKUP([.AG49]; [.$AG$54:.$AH$67]; 2; FALSE)" table:style-name="ce26">
            <text:p>4</text:p>
          </table:table-cell>
          <table:table-cell office:value-type="float" office:value="4" table:formula="of:=[.AH49]" table:style-name="ce23">
            <text:p>4</text:p>
          </table:table-cell>
          <table:table-cell office:value-type="float" office:value="4" table:formula="of:=[.AF49]*[.AI49]" table:style-name="ce5">
            <text:p>4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string" table:style-name="ce24">
            <text:p>A-</text:p>
          </table:table-cell>
          <table:table-cell office:value-type="float" office:value="3.8" table:formula="of:=VLOOKUP([.AG49]; [.$AO$54:.$AP$67]; 2; FALSE)" table:style-name="ce24">
            <text:p>3.8</text:p>
          </table:table-cell>
          <table:table-cell office:value-type="float" office:value="3.8" table:formula="of:=[.AP49]" table:style-name="ce5">
            <text:p>3.8</text:p>
          </table:table-cell>
          <table:table-cell office:value-type="float" office:value="3.8" table:formula="of:=[.AN49]*[.AQ49]" table:style-name="ce5">
            <text:p>3.8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[.AV49]*[.AW49]" table:style-name="ce5">
            <text:p>5</text:p>
          </table:table-cell>
          <table:table-cell table:style-name="ce1"/>
          <table:table-cell office:value-type="float" office:value="45" table:style-name="ce20">
            <text:p>45</text:p>
          </table:table-cell>
          <table:table-cell office:value-type="string" table:style-name="ce6">
            <text:p>特別活動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formula="of:=[.BC49]+1" table:style-name="ce5">
            <text:p>3</text:p>
          </table:table-cell>
          <table:table-cell office:value-type="float" office:value="3" table:formula="of:=[.BB49]*[.BD49]" table:style-name="ce5">
            <text:p>3</text:p>
          </table:table-cell>
          <table:table-cell table:number-columns-repeated="16327"/>
        </table:table-row>
        <table:table-row table:style-name="ro3">
          <table:table-cell/>
          <table:table-cell office:value-type="string" table:style-name="ce7">
            <text:p>GPA平均</text:p>
          </table:table-cell>
          <table:table-cell table:number-columns-repeated="4" table:style-name="ce9"/>
          <table:table-cell office:value-type="float" office:value="3.5382857142857143" table:formula="of:=SUM([.G5:.G49])/SUM([.D5:.D49])" table:style-name="ce8">
            <text:p>3.538285714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4" table:style-name="ce9"/>
          <table:table-cell office:value-type="float" office:value="3.2914285714285723" table:formula="of:=SUM([.N5:.N49])/SUM([.K5:.K49])" table:style-name="ce8">
            <text:p>3.291428571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4" table:style-name="ce9"/>
          <table:table-cell office:value-type="float" office:value="3.6775238095238083" table:formula="of:=SUM([.U5:.U49])/SUM([.R5:.R49])" table:style-name="ce8">
            <text:p>3.67752381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4" table:style-name="ce9"/>
          <table:table-cell office:value-type="float" office:value="3.4209523809523805" table:formula="of:=SUM([.AB5:.AB49])/SUM([.Y5:.Y49])" table:style-name="ce8">
            <text:p>3.420952381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3" table:style-name="ce9"/>
          <table:table-cell table:style-name="ce25"/>
          <table:table-cell table:style-name="ce9"/>
          <table:table-cell office:value-type="float" office:value="3.9204761904761902" table:formula="of:=SUM([.AJ5:.AJ49])/SUM([.AF5:.AF49])" table:style-name="ce8">
            <text:p>3.92047619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5" table:style-name="ce9"/>
          <table:table-cell office:value-type="float" office:value="3.7552380952380946" table:formula="of:=SUM([.AR5:.AR49])/SUM([.AN5:.AN49])" table:style-name="ce8">
            <text:p>3.755238095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3" table:style-name="ce9"/>
          <table:table-cell office:value-type="float" office:value="4.1142857142857139" table:formula="of:=SUM([.AX5:.AX49])/SUM([.AV5:.AV49])" table:style-name="ce8">
            <text:p>4.114285714</text:p>
          </table:table-cell>
          <table:table-cell table:style-name="ce1"/>
          <table:table-cell office:value-type="string" table:style-name="ce7">
            <text:p>GPA平均</text:p>
          </table:table-cell>
          <table:table-cell table:number-columns-repeated="4" table:style-name="ce9"/>
          <table:table-cell office:value-type="float" office:value="4.0428571428571427" table:formula="of:=SUM([.BE5:.BE49])/SUM([.BB5:.BB49])" table:style-name="ce8">
            <text:p>4.042857143</text:p>
          </table:table-cell>
          <table:table-cell table:number-columns-repeated="16327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office:value-type="string" table:number-columns-spanned="6" table:number-rows-spanned="3" table:style-name="ce16">
            <text:p>アメリカの大学受験では4.0スケールを採用していますが、実際はオーバーすることがあり、最大値4.3を採用する高校が多いためその基準で計算しています。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16">
            <text:p>最高数値4.0バージョン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6">
            <text:p>10段階評価の場合、最高数値を4.0ではなく4.3を採用する高校が多いためその基準で計算しています。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16">
            <text:p>最高数値4.0バージョン</text:p>
          </table:table-cell>
          <table:covered-table-cell table:number-columns-repeated="5"/>
          <table:table-cell table:style-name="ce1"/>
          <table:table-cell office:value-type="string" table:number-columns-spanned="7" table:number-rows-spanned="1" table:style-name="ce2">
            <text:p>最高値4.3バージョン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2">
            <text:p>最高値4.0バージョン</text:p>
          </table:table-cell>
          <table:covered-table-cell table:number-columns-repeated="6"/>
          <table:table-cell table:number-columns-repeated="16340" table:style-name="ce1"/>
        </table:table-row>
        <table:table-row table:style-name="ro1">
          <table:table-cell/>
          <table:covered-table-cell/>
          <table:covered-table-cell table:number-columns-repeated="5"/>
          <table:table-cell table:number-columns-repeated="8" table:style-name="ce1"/>
          <table:covered-table-cell/>
          <table:covered-table-cell table:number-columns-repeated="5"/>
          <table:table-cell table:style-name="ce1"/>
          <table:table-cell table:number-columns-repeated="6" table:style-name="ce17"/>
          <table:table-cell table:number-columns-repeated="16356" table:style-name="ce1"/>
        </table:table-row>
        <table:table-row table:style-name="ro2">
          <table:table-cell/>
          <table:covered-table-cell/>
          <table:covered-table-cell table:number-columns-repeated="5"/>
          <table:table-cell table:number-columns-repeated="25" table:style-name="ce1"/>
          <table:table-cell office:value-type="string" table:style-name="ce27">
            <text:p>A+</text:p>
          </table:table-cell>
          <table:table-cell office:value-type="float" office:value="4.3" table:style-name="ce28">
            <text:p>4.3</text:p>
          </table:table-cell>
          <table:table-cell table:number-columns-repeated="6" table:style-name="ce1"/>
          <table:table-cell office:value-type="string" table:style-name="ce27">
            <text:p>A+</text:p>
          </table:table-cell>
          <table:table-cell office:value-type="float" office:value="4" table:style-name="ce28">
            <text:p>4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A</text:p>
          </table:table-cell>
          <table:table-cell office:value-type="float" office:value="4.2" table:style-name="ce30">
            <text:p>4.2</text:p>
          </table:table-cell>
          <table:table-cell table:number-columns-repeated="6" table:style-name="ce1"/>
          <table:table-cell office:value-type="string" table:style-name="ce29">
            <text:p>A</text:p>
          </table:table-cell>
          <table:table-cell office:value-type="float" office:value="3.9" table:style-name="ce30">
            <text:p>3.9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A-</text:p>
          </table:table-cell>
          <table:table-cell office:value-type="float" office:value="4" table:style-name="ce30">
            <text:p>4</text:p>
          </table:table-cell>
          <table:table-cell table:number-columns-repeated="6" table:style-name="ce1"/>
          <table:table-cell office:value-type="string" table:style-name="ce29">
            <text:p>A-</text:p>
          </table:table-cell>
          <table:table-cell office:value-type="float" office:value="3.8" table:style-name="ce30">
            <text:p>3.8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B+</text:p>
          </table:table-cell>
          <table:table-cell office:value-type="float" office:value="3.8" table:style-name="ce30">
            <text:p>3.8</text:p>
          </table:table-cell>
          <table:table-cell table:number-columns-repeated="6" table:style-name="ce1"/>
          <table:table-cell office:value-type="string" table:style-name="ce29">
            <text:p>B+</text:p>
          </table:table-cell>
          <table:table-cell office:value-type="float" office:value="3.7" table:style-name="ce30">
            <text:p>3.7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B</text:p>
          </table:table-cell>
          <table:table-cell office:value-type="float" office:value="3.6" table:style-name="ce30">
            <text:p>3.6</text:p>
          </table:table-cell>
          <table:table-cell table:number-columns-repeated="6" table:style-name="ce1"/>
          <table:table-cell office:value-type="string" table:style-name="ce29">
            <text:p>B</text:p>
          </table:table-cell>
          <table:table-cell office:value-type="float" office:value="3.6" table:style-name="ce30">
            <text:p>3.6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B-</text:p>
          </table:table-cell>
          <table:table-cell office:value-type="float" office:value="3.4" table:style-name="ce30">
            <text:p>3.4</text:p>
          </table:table-cell>
          <table:table-cell table:number-columns-repeated="6" table:style-name="ce1"/>
          <table:table-cell office:value-type="string" table:style-name="ce29">
            <text:p>B-</text:p>
          </table:table-cell>
          <table:table-cell office:value-type="float" office:value="3.4" table:style-name="ce30">
            <text:p>3.4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C+</text:p>
          </table:table-cell>
          <table:table-cell office:value-type="float" office:value="3.2" table:style-name="ce30">
            <text:p>3.2</text:p>
          </table:table-cell>
          <table:table-cell table:number-columns-repeated="6" table:style-name="ce1"/>
          <table:table-cell office:value-type="string" table:style-name="ce29">
            <text:p>C+</text:p>
          </table:table-cell>
          <table:table-cell office:value-type="float" office:value="3.2" table:style-name="ce30">
            <text:p>3.2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C</text:p>
          </table:table-cell>
          <table:table-cell office:value-type="float" office:value="3" table:style-name="ce30">
            <text:p>3</text:p>
          </table:table-cell>
          <table:table-cell table:number-columns-repeated="6" table:style-name="ce1"/>
          <table:table-cell office:value-type="string" table:style-name="ce29">
            <text:p>C</text:p>
          </table:table-cell>
          <table:table-cell office:value-type="float" office:value="3" table:style-name="ce30">
            <text:p>3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C-</text:p>
          </table:table-cell>
          <table:table-cell office:value-type="float" office:value="2.8" table:style-name="ce30">
            <text:p>2.8</text:p>
          </table:table-cell>
          <table:table-cell table:number-columns-repeated="6" table:style-name="ce1"/>
          <table:table-cell office:value-type="string" table:style-name="ce29">
            <text:p>C-</text:p>
          </table:table-cell>
          <table:table-cell office:value-type="float" office:value="2.8" table:style-name="ce30">
            <text:p>2.8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D+</text:p>
          </table:table-cell>
          <table:table-cell office:value-type="float" office:value="2.6" table:style-name="ce30">
            <text:p>2.6</text:p>
          </table:table-cell>
          <table:table-cell table:number-columns-repeated="6" table:style-name="ce1"/>
          <table:table-cell office:value-type="string" table:style-name="ce29">
            <text:p>D+</text:p>
          </table:table-cell>
          <table:table-cell office:value-type="float" office:value="2.6" table:style-name="ce30">
            <text:p>2.6</text:p>
          </table:table-cell>
          <table:table-cell table:number-columns-repeated="16342" table:style-name="ce1"/>
        </table:table-row>
        <table:table-row table:style-name="ro2">
          <table:table-cell/>
          <table:table-cell table:number-columns-repeated="31" table:style-name="ce1"/>
          <table:table-cell office:value-type="string" table:style-name="ce29">
            <text:p>D</text:p>
          </table:table-cell>
          <table:table-cell office:value-type="float" office:value="2.4" table:style-name="ce30">
            <text:p>2.4</text:p>
          </table:table-cell>
          <table:table-cell table:number-columns-repeated="6" table:style-name="ce1"/>
          <table:table-cell office:value-type="string" table:style-name="ce29">
            <text:p>D</text:p>
          </table:table-cell>
          <table:table-cell office:value-type="float" office:value="2.4" table:style-name="ce30">
            <text:p>2.4</text:p>
          </table:table-cell>
          <table:table-cell table:number-columns-repeated="16342" table:style-name="ce1"/>
        </table:table-row>
        <table:table-row table:style-name="ro2">
          <table:table-cell table:number-columns-repeated="32"/>
          <table:table-cell office:value-type="string" table:style-name="ce29">
            <text:p>D-</text:p>
          </table:table-cell>
          <table:table-cell office:value-type="float" office:value="2.2000000000000002" table:style-name="ce30">
            <text:p>2.2</text:p>
          </table:table-cell>
          <table:table-cell table:number-columns-repeated="6" table:style-name="ce1"/>
          <table:table-cell office:value-type="string" table:style-name="ce29">
            <text:p>D-</text:p>
          </table:table-cell>
          <table:table-cell office:value-type="float" office:value="2.2000000000000002" table:style-name="ce30">
            <text:p>2.2</text:p>
          </table:table-cell>
          <table:table-cell table:number-columns-repeated="16342"/>
        </table:table-row>
        <table:table-row table:style-name="ro2">
          <table:table-cell table:number-columns-repeated="32"/>
          <table:table-cell office:value-type="string" table:style-name="ce29">
            <text:p>E</text:p>
          </table:table-cell>
          <table:table-cell office:value-type="float" office:value="2" table:style-name="ce30">
            <text:p>2</text:p>
          </table:table-cell>
          <table:table-cell table:number-columns-repeated="6" table:style-name="ce1"/>
          <table:table-cell office:value-type="string" table:style-name="ce29">
            <text:p>E</text:p>
          </table:table-cell>
          <table:table-cell office:value-type="float" office:value="2" table:style-name="ce30">
            <text:p>2</text:p>
          </table:table-cell>
          <table:table-cell table:number-columns-repeated="16342"/>
        </table:table-row>
        <table:table-row table:style-name="ro1">
          <table:table-cell table:number-columns-repeated="32"/>
          <table:table-cell office:value-type="string" table:style-name="ce31">
            <text:p>F</text:p>
          </table:table-cell>
          <table:table-cell office:value-type="float" office:value="0" table:style-name="ce32">
            <text:p>0</text:p>
          </table:table-cell>
          <table:table-cell table:number-columns-repeated="6" table:style-name="ce1"/>
          <table:table-cell office:value-type="string" table:style-name="ce31">
            <text:p>F</text:p>
          </table:table-cell>
          <table:table-cell office:value-type="float" office:value="0" table:style-name="ce32">
            <text:p>0</text:p>
          </table:table-cell>
          <table:table-cell table:number-columns-repeated="1634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2"/>
          <table:table-cell table:style-name="ce1"/>
          <table:table-cell office:value-type="string" table:style-name="ce1">
            <text:p>AH列の数値は各学校で異なりますので各自でご調整ください。</text:p>
          </table:table-cell>
          <table:table-cell table:number-columns-repeated="7" table:style-name="ce1"/>
          <table:table-cell office:value-type="string" table:style-name="ce1">
            <text:p>AP列の数値は各学校で異なりますので各自でご調整ください。</text:p>
          </table:table-cell>
          <table:table-cell table:number-columns-repeated="16342"/>
        </table:table-row>
        <table:table-row table:style-name="ro2">
          <table:table-cell table:number-columns-repeated="32"/>
          <table:table-cell table:style-name="ce1"/>
          <table:table-cell office:value-type="string" table:style-name="ce1">
            <text:p>アルファベット（記号）も変更することが可能です。</text:p>
          </table:table-cell>
          <table:table-cell table:number-columns-repeated="7" table:style-name="ce1"/>
          <table:table-cell office:value-type="string" table:style-name="ce1">
            <text:p>アルファベット（記号）も変更することが可能です。</text:p>
          </table:table-cell>
          <table:table-cell table:number-columns-repeated="16342"/>
        </table:table-row>
        <table:table-row table:number-rows-repeated="10485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324</meta:generator>
    <meta:initial-creator>Yoshinao Ebisawa</meta:initial-creator>
    <dc:creator>Yoshinao Ebisawa</dc:creator>
    <meta:creation-date>2025-02-04T01:28:42Z</meta:creation-date>
    <dc:date>2025-02-04T03:34:12Z</dc:date>
  </office:meta>
</office:document-meta>
</file>