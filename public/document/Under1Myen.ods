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Courier New" style:font-name-asian="Courier New" style:font-name-complex="Courier New" fo:font-size="14pt" style:font-size-asian="14pt" style:font-size-complex="14pt" style:font-family-generic="modern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ext-properties style:font-name="Courier New" style:font-name-asian="Courier New" style:font-name-complex="Courier New" fo:font-size="14pt" style:font-size-asian="14pt" style:font-size-complex="14pt" style:font-family-generic="modern"/>
    </style:style>
    <style:style style:name="co1" style:family="table-column">
      <style:table-column-properties fo:break-before="auto" style:column-width="10.7420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37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大学名</text:p>
            <text:p>206大学</text:p>
          </table:table-cell>
          <table:table-cell office:value-type="string" table:style-name="ce2">
            <text:p>授業料</text:p>
            <text:p>１００万円</text:p>
            <text:p>以下</text:p>
            <text:p>*奨学金付きあり</text:p>
          </table:table-cell>
          <table:table-cell office:value-type="string" table:style-name="ce2">
            <text:p>€ 7,000</text:p>
            <text:p>US$ 7,000</text:p>
            <text:p>£ 6,000</text:p>
            <text:p>CA$ 10,000</text:p>
            <text:p>AU$ 12,000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3">
            <text:p>Abraham Baldwin Agricultural Colleg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AGH University of Science and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merican University of Armen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merican University of Phnom Penh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ngelo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rden University Berli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Aristotle University of Thessaloniki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rt Academy of Latv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Aschaffenburg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ubur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ugusta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ustin Peay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utonomous University of Madrid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Azerbaijan Technical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Azerbaijan Technological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Baku Engineering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Basilicata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Berlin International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Bishop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Bismarck State Colleg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Bluefield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Bridgewater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Carinthia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Catholic University of Louvai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Central Europea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Charle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Clayton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Cracow University of Economic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Dakota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Darmstadt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Daugavpil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Deggendorf Institute of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Delta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Dickinson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East Tennessee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East Texas A&amp;M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Eastern Kentucky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Eastern New Mexico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4">
          <table:table-cell office:value-type="string" table:style-name="ce3">
            <text:p>Europa Universitat Flensburg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airmont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FH Aachen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Florida Agricultural and Mechanical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lorida A&amp;M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lorida Atlantic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lorida Gulf Coast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ort Valley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rancis Mario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ree University of Brussels ULB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ree University of Brussels VUB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reie Universitat Berli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Frostburg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Fulda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Gavle University Colleg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Gdansk University of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Georgia Souther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Georgia Southwestern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Ghent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Grambling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Hamburg University of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Hasselt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Heilbronn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Heinrich Heine University Dusseldorf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Hochschule der Medie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Hochschule Fresenius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Hochschule Furtwage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Hochschule Geisenheim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Hof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Illinois Institute of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International Business School of Bulgar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International Hellenic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Iowa State University of Science and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Jacksonville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Jagiellonia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Jan Kochanowski University of Kielc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Johannes Gutenberg University Mainz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Kennesaw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Kentucky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Klaipeda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KU Leuve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Kutztown University of Pennsylvan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ander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angsto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atvia University of Agricultur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eide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eipzig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euphana University Luneburg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innaeu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ithuanian Sport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Lithuanian University of Educational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Lithuanian University of Health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Lodz University of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Masaryk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Marshall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Martin Luther University Halle-Wittenberg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McNeese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Middle Georgia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Middle Tennessee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Mykolas Romeri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National and Kapodistrian University of Athen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National Chi Nan University 曁南国際大学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National Kaohsiung University of Science and Technology 高雄科技大学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National Taipei University 台北大学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National Taiwan University of Science and Technology 台湾科技大学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New Bulgaria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New College of Florid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Oklahoma Panhandle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Ostbayerische Technische Hochschule Amberg-Weide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Parthenope University of Napl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Pforzheim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Pompeu Fabra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Poznan University of Life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Radboud University Nijmege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Reutlinge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Rhine-Waal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Riga Technical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Riga Stradin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Rosenheim Technical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Savannah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Schmalkalden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Sofia University Bulgar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South Westphalia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Southeastern Oklahoma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allin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allinn University of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amkang University 淡江大学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ampere University</text:p>
          </table:table-cell>
          <table:table-cell table:style-name="ce2"/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Technical University of Applied Sciences Wurzburg-Schweinfurt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echnical University of Liberec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echnical University of Munich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echnische Hochschule Ingolstadt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exas Southern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exas Tech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The University of North Carolina at Pembrok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he University of Pardubic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homas Edison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hrac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omas Bata University in Zli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Trier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Tunghai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at Breme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at der Saarland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College of Enterprise and Administration in Lubli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Agriculture in Krakow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Antwerp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of Applied Sciences Northwestern Switzerland FHNW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of Arkansas at Fort Smith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of Arkansas at Little Rock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of Arkansas at Monticello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of Arkansas at Pine Bluff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Arkansas Fayettevill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Arkansas Grantham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Bahrai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Base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Bayreuth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Ber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Bologn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Cagliari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Calgar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Cret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Florid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Forestr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Freiburg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Fribourg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Gdansk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Genev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Guelph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Housto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Klagenfurt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Latv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Lausann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Lieg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of Life Sciences in Lublin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Lucerne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Macedon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Messin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Mon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Namur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Neuchate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New Orlean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North Florid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North Texa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Sanmarino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University of Science and Arts of Oklahom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Tartu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Texas at El Paso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Texas at Tyler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Warsaw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West Attic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West Florid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Western Macedonia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Wroclaw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University of Zurich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Valdosta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Varna Fre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Vilnius Gediminas Technical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Vilniu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Virginia State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Vytautas Magnus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Warsaw University of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Website der OTH Regensburg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Webster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3">
            <text:p>West Texas A&amp;M Universit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Worms University of Applied Science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Wroclaw University of Science and Technology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WU Vienna University of Economics and Business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5">
            <text:p>豊田工業大学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81" table:style-name="ce1"/>
        </table:table-row>
        <table:table-row table:number-rows-repeated="104836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324</meta:generator>
    <meta:initial-creator>Yoshinao Ebisawa</meta:initial-creator>
    <dc:creator>Yoshinao Ebisawa</dc:creator>
    <meta:creation-date>2025-01-12T13:26:55Z</meta:creation-date>
    <dc:date>2025-01-17T05:30:00Z</dc:date>
  </office:meta>
</office:document-meta>
</file>