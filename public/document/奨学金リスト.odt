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Gothic" svg:font-family="Yu Gothic" style:font-family-generic="swiss" style:font-pitch="variable" svg:panose-1="2 11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AUW International Fellowship</text:p>
      <text:p text:style-name="Normal">ACI Foundation Scholarship</text:p>
      <text:p text:style-name="Normal">AESEF Graduate Studies Grants</text:p>
      <text:p text:style-name="Normal">AFS Japan</text:p>
      <text:p text:style-name="Normal">AIG高校生外交官プログラム</text:p>
      <text:p text:style-name="Normal">AIPPI中松記念スカラーシップ</text:p>
      <text:p text:style-name="Normal">AISLハロウ奨学金財団</text:p>
      <text:p text:style-name="Normal">ALLEX FOUNDATION TA Program</text:p>
      <text:p text:style-name="Normal">Amelia Earhart Fellowship for Women in Aerospace-related Sciences and Engineering</text:p>
      <text:p text:style-name="Normal">Asia Foundation LeaderNext Program</text:p>
      <text:p text:style-name="Normal">Asian Institute of Technology AIT Scholarships</text:p>
      <text:p text:style-name="Normal">Atelier basi</text:p>
      <text:p text:style-name="Normal">AYFN Winter Korean Culture Camp</text:p>
      <text:p text:style-name="Normal">Aziz Foundation Scholarship</text:p>
      <text:p text:style-name="Normal">アイスランド政府奨学金</text:p>
      <text:p text:style-name="Normal">アジア国際交流財団</text:p>
      <text:p text:style-name="Normal">アジア次世代指導者奨学金</text:p>
      <text:p text:style-name="Normal">アジア太平洋リーダーシップ</text:p>
      <text:p text:style-name="Normal">アステラス研究賞学会奨学金</text:p>
      <text:p text:style-name="Normal">あなたにカンケイあるテレビテレ玉奨学金</text:p>
      <text:p text:style-name="Normal">麻生オックスフォード大学院ニューカレッジ奨学金</text:p>
      <text:p text:style-name="Normal">愛知県小牧市大学生等海外留学奨学金</text:p>
      <text:p text:style-name="Normal">愛知県田原市奨学金</text:p>
      <text:p text:style-name="Normal">愛知県豊田市トレヴェリアン奨学金</text:p>
      <text:p text:style-name="Normal">荒井権八奨学金</text:p>
      <text:soft-page-break/>
      <text:p text:style-name="Normal">荒井芳男記念財団</text:p>
      <text:p text:style-name="Normal">秋田県高校生長期留学派遣事業わか杉のさと奨学金</text:p>
      <text:p text:style-name="Normal">青井奨学会</text:p>
      <text:p text:style-name="Normal">Baker Kanagawa US Japan Endowed Scholarship</text:p>
      <text:p text:style-name="Normal">Banting Postdoctral Fellowships</text:p>
      <text:p text:style-name="Normal">BCJA英国留学奨学金</text:p>
      <text:p text:style-name="Normal">BCJ国際奨学財団</text:p>
      <text:p text:style-name="Normal">BeArt Scholarship</text:p>
      <text:p text:style-name="Normal">British Council Japan IELTS奨学金</text:p>
      <text:p text:style-name="Normal">Bucharest Summer University Summer School</text:p>
      <text:p text:style-name="Normal">ブルネイ・ダルサラーム国政府奨学金</text:p>
      <text:p text:style-name="Normal">ベルギー国フランダース政府奨学金</text:p>
      <text:p text:style-name="Normal">ベルギー国際交流メンバー</text:p>
      <text:p text:style-name="Normal">仏教伝道協会</text:p>
      <text:p text:style-name="Normal">米日カウンシル渡邊利三奨学金</text:p>
      <text:p text:style-name="Normal">Canada Youth Congress</text:p>
      <text:p text:style-name="Normal">Central Bank of Ireland Graduate Programme</text:p>
      <text:p text:style-name="Normal">CERN Summer Programme</text:p>
      <text:p text:style-name="Normal">Clarendon Fund</text:p>
      <text:p text:style-name="Normal">Clark Art Institute Fellowship</text:p>
      <text:p text:style-name="Normal">CWAJ Cartier奨学金</text:p>
      <text:p text:style-name="Normal">CWAJ海外留学大学院女子奨学金</text:p>
      <text:p text:style-name="Normal">中外創薬科学財団</text:p>
      <text:p text:style-name="Normal">DAAD奨学金　ドイツ学術交流会</text:p>
      <text:soft-page-break/>
      <text:p text:style-name="Normal">DashTickets Foundation</text:p>
      <text:p text:style-name="Normal">Davis United World College Scholarship</text:p>
      <text:p text:style-name="Normal">DESY Summer Student Program</text:p>
      <text:p text:style-name="Normal">デンマーク政府奨学金</text:p>
      <text:p text:style-name="Normal">三共生命科学研究振興財団</text:p>
      <text:p text:style-name="Normal">大韓民国政府奨学金</text:p>
      <text:p text:style-name="Normal">East West Centre Graduate Degree Fellowship</text:p>
      <text:p text:style-name="Normal">East West Centre in Washington Young Professional Program</text:p>
      <text:p text:style-name="Normal">Ecole des ponts ParisTech</text:p>
      <text:p text:style-name="Normal">Edmund S. Muskie Professional Fellowship Program</text:p>
      <text:p text:style-name="Normal">EDUFIフィンランド政府奨学金</text:p>
      <text:p text:style-name="Normal">EF留学奨学金</text:p>
      <text:p text:style-name="Normal">Eira Francis Davies Scholarships in Human and Health Sciences</text:p>
      <text:p text:style-name="Normal">ELS大学準備プログラム×TOMODACHI奨学生</text:p>
      <text:p text:style-name="Normal">Emerging Climate Leaders Fellowship</text:p>
      <text:p text:style-name="Normal">ENS International Section</text:p>
      <text:p text:style-name="Normal">EPFL</text:p>
      <text:p text:style-name="Normal">Master Excellence Fellowships</text:p>
      <text:p text:style-name="Normal">Erasmus Munds Joint Masters – Erasmus+</text:p>
      <text:p text:style-name="Normal">Ertegun Graduate Scholarship Programme in the Humanities</text:p>
      <text:p text:style-name="Normal">Ethereum Foundation</text:p>
      <text:p text:style-name="Normal">European Commision</text:p>
      <text:p text:style-name="Normal">エン人材教育財団</text:p>
      <text:p text:style-name="Normal">江副リクルート財団</text:p>
      <text:p text:style-name="Normal">Facebook PhD Fellowship</text:p>
      <text:p text:style-name="Normal">FASID<text:s/>奨学金プログラム</text:p>
      <text:soft-page-break/>
      <text:p text:style-name="Normal">FINCAD Women in Finance Scholarship Programme</text:p>
      <text:p text:style-name="Normal">Florida Linkage Japan</text:p>
      <text:p text:style-name="Normal">Forte MBA Fellows Program for Women</text:p>
      <text:p text:style-name="Normal">Fowler Family Fellowship</text:p>
      <text:p text:style-name="Normal">France Eiffel Excellence Scholarship</text:p>
      <text:p text:style-name="Normal">フクシマグローバル人材支援奨学財団</text:p>
      <text:p text:style-name="Normal">52Hz Accelerator</text:p>
      <text:p text:style-name="Normal">Generation Google Scholarship: for Women in Computer Science in Ireland</text:p>
      <text:p text:style-name="Normal">Generation Google Scholarship for EMEA</text:p>
      <text:p text:style-name="Normal">Generation Google Scholarship for North America</text:p>
      <text:p text:style-name="Normal">Georgia未来応援奨学金</text:p>
      <text:p text:style-name="Normal">Global Peace Chain</text:p>
      <text:p text:style-name="Normal">Global Peace Forum</text:p>
      <text:p text:style-name="Normal">Goizueta Scholars Award</text:p>
      <text:p text:style-name="Normal">Goldwater Scholarship &amp; Excellence in Education Foundation</text:p>
      <text:p text:style-name="Normal">Google DeepMind Scholarship</text:p>
      <text:p text:style-name="Normal">Google Lime Scholarship</text:p>
      <text:p text:style-name="Normal">Google PhD Fellowship Program</text:p>
      <text:p text:style-name="Normal">グリーン・アート奨学金</text:p>
      <text:p text:style-name="Normal">グルー・バンクロフト基金</text:p>
      <text:p text:style-name="Normal">ぐんま赤尾奨学財団</text:p>
      <text:p text:style-name="Normal">業務スーパージャパンドリーム財団奨学金</text:p>
      <text:p text:style-name="Normal">Henrich Boll Scholarships</text:p>
      <text:p text:style-name="Normal">HIOKI奨学金・緑化基金</text:p>
      <text:p text:style-name="Normal">Hong Kong PhD Fellowship Scheme</text:p>
      <text:p text:style-name="Normal">HZDR Summer Student Program</text:p>
      <text:soft-page-break/>
      <text:p text:style-name="Normal">はばたけ！女性応援奨学金　学位取得</text:p>
      <text:p text:style-name="Normal">はばたけ！女性応援奨学金　短期</text:p>
      <text:p text:style-name="Normal">はばたけ！女性応援奨学金　長期</text:p>
      <text:p text:style-name="Normal">はまぎん産業文化振興財団</text:p>
      <text:p text:style-name="Normal">ヒロシマ平和創造基金海外留学奨学金</text:p>
      <text:p text:style-name="Normal">ヒロシマ平和創造基金中村音楽奨学金</text:p>
      <text:p text:style-name="Normal">フランス政府奨学金</text:p>
      <text:p text:style-name="Normal">フルブライト奨学金</text:p>
      <text:p text:style-name="Normal">ヒロシマJET奨学金</text:p>
      <text:p text:style-name="Normal">平沢和重奨学金</text:p>
      <text:p text:style-name="Normal">船井情報科学振興財団</text:p>
      <text:p text:style-name="Normal">福井県きぼう応援海外留学奨学金</text:p>
      <text:p text:style-name="Normal">福岡県アンビシャス外国留学支援事業</text:p>
      <text:p text:style-name="Normal">兵庫県宝塚市松本・土井アイリン海外留学助成金</text:p>
      <text:p text:style-name="Normal">平和中島財団</text:p>
      <text:p text:style-name="Normal">本庄国際奨学財団</text:p>
      <text:p text:style-name="Normal">IAESTE</text:p>
      <text:p text:style-name="Normal">ICCR奨学金</text:p>
      <text:p text:style-name="Normal">Iceland Writers Retreat</text:p>
      <text:p text:style-name="Normal">IEG Fellowship</text:p>
      <text:p text:style-name="Normal">Immerse Education</text:p>
      <text:p text:style-name="Normal">IMU Breakout Graduate Fellowship</text:p>
      <text:p text:style-name="Normal">International Peace Scholarship for Women</text:p>
      <text:p text:style-name="Normal">International Space Funding and Scholarship for International Students</text:p>
      <text:soft-page-break/>
      <text:p text:style-name="Normal">Ireland Fellowship Program</text:p>
      <text:p text:style-name="Normal">IRENA Youth Forum</text:p>
      <text:p text:style-name="Normal">イタリア政府奨学金</text:p>
      <text:p text:style-name="Normal">イノアック国際教育振興財団</text:p>
      <text:p text:style-name="Normal">イラン短期研修プログラム</text:p>
      <text:p text:style-name="Normal">インドネシア政府奨学金</text:p>
      <text:p text:style-name="Normal">インペックス教育交流財団</text:p>
      <text:p text:style-name="Normal">伊東国際教育文流財団</text:p>
      <text:p text:style-name="Normal">茨城海外留学支援事業</text:p>
      <text:p text:style-name="Normal">岩佐教育文化財団奨学金</text:p>
      <text:p text:style-name="Normal">岩槻東ロータリークラブ杉田政男奨学金</text:p>
      <text:p text:style-name="Normal">石橋財団</text:p>
      <text:p text:style-name="Normal">飯塚毅育英財団</text:p>
      <text:p text:style-name="Normal">「循環をデザインする会社」石坂産業奨学金</text:p>
      <text:p text:style-name="Normal">Jack Kent Cooke Foundation</text:p>
      <text:p text:style-name="Normal">JAICA</text:p>
      <text:p text:style-name="Normal">Japan-IMFスカラシッププログラム</text:p>
      <text:p text:style-name="Normal">JASSO海外留学奨学金</text:p>
      <text:p text:style-name="Normal">Jefferson Fellowships</text:p>
      <text:p text:style-name="Normal">情報処理推進機構　未踏IT人財発掘・育成事業</text:p>
      <text:p text:style-name="Normal">KAIST交換留学プログラム</text:p>
      <text:p text:style-name="Normal">KDDI財団日本人留学生奨学金</text:p>
      <text:p text:style-name="Normal">Kiyo Sakaguchi Scholarship</text:p>
      <text:p text:style-name="Normal">Knight-Hennessy Scholarship</text:p>
      <text:soft-page-break/>
      <text:p text:style-name="Normal">カナエ奨学金</text:p>
      <text:p text:style-name="Normal">カネパッケージ奨学金</text:p>
      <text:p text:style-name="Normal">カロネコ奨学金</text:p>
      <text:p text:style-name="Normal">クマ財団</text:p>
      <text:p text:style-name="Normal">クラブ支援ロータリー米山記念奨学金</text:p>
      <text:p text:style-name="Normal">クリハラント記念財団</text:p>
      <text:p text:style-name="Normal">コロンビア政府奨学金</text:p>
      <text:p text:style-name="Normal">川口静江記念奨学生</text:p>
      <text:p text:style-name="Normal">河内奨学財団</text:p>
      <text:p text:style-name="Normal">関奉仕財団留学支援奨学金</text:p>
      <text:p text:style-name="Normal">韓日共同高等教育留学生交流事業</text:p>
      <text:p text:style-name="Normal">教育省台湾奨学金</text:p>
      <text:p text:style-name="Normal">熊川財団</text:p>
      <text:p text:style-name="Normal">熊本県留学奨学金</text:p>
      <text:p text:style-name="Normal">経団連　グローバル人材育成スカラーシップ</text:p>
      <text:p text:style-name="Normal">埼玉県立浦和高等学校同窓会奨学財団</text:p>
      <text:p text:style-name="Normal">公文国際奨学財団</text:p>
      <text:p text:style-name="Normal">皇太子明仁新王奨学金</text:p>
      <text:p text:style-name="Normal">高校生バイオサミット</text:p>
      <text:p text:style-name="Normal">国際開発機構奨学金プログラム</text:p>
      <text:p text:style-name="Normal">国土交通省観光庁奨学金</text:p>
      <text:p text:style-name="Normal">小山台教育財団</text:p>
      <text:soft-page-break/>
      <text:p text:style-name="Normal">神山財団海外留学奨学金</text:p>
      <text:p text:style-name="Normal">神奈川県横浜市留学奨学金</text:p>
      <text:p text:style-name="Normal">「水のマエサワ」東南アジア留学奨学金</text:p>
      <text:p text:style-name="Normal">MAGIC Grants Multidisciplinary Academic Grants in Cryptocurrencies</text:p>
      <text:p text:style-name="Normal">Margaret McNamara Memorial for Women</text:p>
      <text:p text:style-name="Normal">Marie Sktodowska-Cuire Actions</text:p>
      <text:p text:style-name="Normal">McCall MacBain Foundation</text:p>
      <text:p text:style-name="Normal">Melbourne Research Scholarship</text:p>
      <text:p text:style-name="Normal">MIEFプログラム</text:p>
      <text:p text:style-name="Normal">MOGPA Fellowship</text:p>
      <text:p text:style-name="Normal">MPOWER Financing Global Citizen Scholarship</text:p>
      <text:p text:style-name="Normal">MPOWER Financing MBA Scholarship</text:p>
      <text:p text:style-name="Normal">MPOWER Financing Monthly Scholarship Series</text:p>
      <text:p text:style-name="Normal">MPOWER Financing STEM Scholarship</text:p>
      <text:p text:style-name="Normal">マレーシア政府奨学金</text:p>
      <text:p text:style-name="Normal">みずほ国際交流奨学財団</text:p>
      <text:p text:style-name="Normal">メキシコ政府奨学金</text:p>
      <text:p text:style-name="Normal">モンゴル政府奨学金</text:p>
      <text:p text:style-name="Normal">恵国際交流財団奨学金</text:p>
      <text:p text:style-name="Normal">持田・ストロナク全額奨学金</text:p>
      <text:p text:style-name="Normal">持田記念医学薬学振興財団</text:p>
      <text:p text:style-name="Normal">松園尚己記念財団テイクオフ奨学金</text:p>
      <text:p text:style-name="Normal">松園尚己記念財団未来のトビラ奨学金</text:p>
      <text:p text:style-name="Normal">松下幸之助国際スカラシップ</text:p>
      <text:soft-page-break/>
      <text:p text:style-name="Normal">松尾育英会</text:p>
      <text:p text:style-name="Normal">村森豊明会</text:p>
      <text:p text:style-name="Normal">村田海外留学奨学会</text:p>
      <text:p text:style-name="Normal">南カリフォルニア・福島ユース文化交流プログラム</text:p>
      <text:p text:style-name="Normal">未踏ジュニア</text:p>
      <text:p text:style-name="Normal">未来へつなぐ地域とJA埼玉奨学金</text:p>
      <text:p text:style-name="Normal">明光奨学金</text:p>
      <text:p text:style-name="Normal">明治安田クオリティオブライフ文化財団</text:p>
      <text:p text:style-name="Normal">眞美ちゃん奨学金</text:p>
      <text:p text:style-name="Normal">NAACP Scholarship</text:p>
      <text:p text:style-name="Normal">New York Noyce STEM Pipeline Program</text:p>
      <text:p text:style-name="Normal">NIPPON SIGNALグローバルチャレンジ奨学金</text:p>
      <text:p text:style-name="Normal">NL Scholarship</text:p>
      <text:p text:style-name="Normal">ナレッジイノベーションアワード</text:p>
      <text:p text:style-name="Normal">ニューヨーク野口英世記念会奨学金</text:p>
      <text:p text:style-name="Normal">新潟県新潟市国際交流協会高校生留学奨学金</text:p>
      <text:p text:style-name="Normal">新潟県長岡市留学奨学金</text:p>
      <text:p text:style-name="Normal">中谷医工計測技術振興財団</text:p>
      <text:p text:style-name="Normal">中冨健康科学振興財団</text:p>
      <text:p text:style-name="Normal">長嶋記念財団</text:p>
      <text:p text:style-name="Normal">内藤記念科学振興財団</text:p>
      <text:p text:style-name="Normal">南極地域観測隊</text:p>
      <text:p text:style-name="Normal">二十一世紀文化学術振興財団</text:p>
      <text:soft-page-break/>
      <text:p text:style-name="Normal">日揮・実吉奨学会　海外留学支援制度</text:p>
      <text:p text:style-name="Normal">日系スカラーシップ・夢の実現プロジェクト</text:p>
      <text:p text:style-name="Normal">日台文化交流青少年スカラシップ</text:p>
      <text:p text:style-name="Normal">日中笹川医学奨学金制度</text:p>
      <text:p text:style-name="Normal">日米協会AMERICA BOWL</text:p>
      <text:p text:style-name="Normal">日米教育交流振興財団</text:p>
      <text:p text:style-name="Normal">日米友好基金<text:s/>US – Japan Creative Artist Fellowship Program</text:p>
      <text:p text:style-name="Normal">日本学術振興会海外特別研究員</text:p>
      <text:p text:style-name="Normal">日本国際協会</text:p>
      <text:p text:style-name="Normal">日本財団アジア・フェローシップ（APIフェローシップ）</text:p>
      <text:p text:style-name="Normal">日本財団直格障害者海外奨学金事業</text:p>
      <text:p text:style-name="Normal">野口医学研究所</text:p>
      <text:p text:style-name="Normal">One Young World</text:p>
      <text:p text:style-name="Normal">Oxford Kobe Scholarship</text:p>
      <text:p text:style-name="Normal">Oxford Summer<text:s/>Programme</text:p>
      <text:p text:style-name="Normal">Oxford-Anderson Humanities Graduate Scholarship</text:p>
      <text:p text:style-name="Normal">Oxford-Berman Graduate Scholarship</text:p>
      <text:p text:style-name="Normal">Oxford-Bounden Graduate Scholarship</text:p>
      <text:p text:style-name="Normal">Oxford-David Jones Graduate Scholarship</text:p>
      <text:p text:style-name="Normal">Oxford-DeepMind Graduate Scholarship</text:p>
      <text:p text:style-name="Normal">Oxford-E P Abraham Research Fund Graduate Scholarships</text:p>
      <text:p text:style-name="Normal">Oxford-Emmy Graduate Scholarship</text:p>
      <text:p text:style-name="Normal">Oxford-Farthing Graduate Scholarship</text:p>
      <text:p text:style-name="Normal">Oxford-Finnis Graduate Scholarship</text:p>
      <text:p text:style-name="Normal">Oxford-Hackney BCL Graduate Scholarship</text:p>
      <text:soft-page-break/>
      <text:p text:style-name="Normal">Oxford-Hoffman Graduate Scholarship in Medical Sciences</text:p>
      <text:p text:style-name="Normal">Oxford-John Oldacre Graduate Scholarship</text:p>
      <text:p text:style-name="Normal">Oxford-Moh Family Foundation Global Health Scholarship</text:p>
      <text:p text:style-name="Normal">Oxford-Murray Graduate Scholarship</text:p>
      <text:p text:style-name="Normal">Oxford-NaturalMotion and Oxford-Oxitec Graduate Scholarships</text:p>
      <text:p text:style-name="Normal">Oxford-Nizami Ganjavi Graduate Scholarships</text:p>
      <text:p text:style-name="Normal">Oxford-Nuffield Max Corden Graduate Scholarship</text:p>
      <text:p text:style-name="Normal">Oxford-Nuffield Tony and Judith Atkinson Graduate Scholarship</text:p>
      <text:p text:style-name="Normal">Oxford-Percival Stanion Graduate Scholarship</text:p>
      <text:p text:style-name="Normal">Oxford-R. E. Jones Graduate Scholarship</text:p>
      <text:p text:style-name="Normal">Oxford-Radcliffe Graduate Scholarships</text:p>
      <text:p text:style-name="Normal">Oxford-Reuben Graduate Scholarships</text:p>
      <text:p text:style-name="Normal">Oxford-Richards Graduate Scholarships</text:p>
      <text:p text:style-name="Normal">Oxford-Thatcher Graduate Scholarships</text:p>
      <text:p text:style-name="Normal">Oxford-Uehiro Graduate Scholarships</text:p>
      <text:p text:style-name="Normal">Oxford-Wolfson College-Reginald Campbell Thompson Graduate Scholarship in Assyriology</text:p>
      <text:p text:style-name="Normal">Oxford-Wolfson-Marriott Graduate Scholarship</text:p>
      <text:p text:style-name="Normal">オーストラリア政府奨学金</text:p>
      <text:p text:style-name="Normal">オマーン政府奨学金</text:p>
      <text:p text:style-name="Normal">小川賢太郎奨学財団</text:p>
      <text:p text:style-name="Normal">小渕奨学金</text:p>
      <text:p text:style-name="Normal">大林財団</text:p>
      <text:p text:style-name="Normal">大阪グローバル塾修了生専用　高校生等海外進学助成金</text:p>
      <text:p text:style-name="Normal">大友福祉振興財団Penn GSE Funding Opportunities</text:p>
      <text:p text:style-name="Normal">PHI Theta Kappa Honors Society Scholarship</text:p>
      <text:p text:style-name="Normal">Pierre Elliott Trudeau Scholarship</text:p>
      <text:soft-page-break/>
      <text:p text:style-name="Normal">Pioneering Ideas: Exploring the Future to Build a Culture of Health</text:p>
      <text:p text:style-name="Normal">Pioneering Ideas: Wxploring the Future to Build a Culture of Health Addressing Childhood Obesity and Health Inequities</text:p>
      <text:p text:style-name="Normal">ポーランド政府奨学金</text:p>
      <text:p text:style-name="Normal">ポーラ美術振興財団</text:p>
      <text:p text:style-name="Normal">北京大学国際関係大学院プログラム</text:p>
      <text:p text:style-name="Normal">Qatar Scholarship</text:p>
      <text:p text:style-name="Normal">QS ImpACT Social Responsibility Scholarship</text:p>
      <text:p text:style-name="Normal">Quad Fellowship</text:p>
      <text:p text:style-name="Normal">Radbound Scholarship Programme</text:p>
      <text:p text:style-name="Normal">RISE Global Winner</text:p>
      <text:p text:style-name="Normal">ROOT –<text:s/>国際的化学技術人財育成プログラム</text:p>
      <text:p text:style-name="Normal">ラトビア政府奨学金</text:p>
      <text:p text:style-name="Normal">りゅうぎん海外留学支援事業</text:p>
      <text:p text:style-name="Normal">ルーマニア政府奨学金</text:p>
      <text:p text:style-name="Normal">ロータリー財団奨学金</text:p>
      <text:p text:style-name="Normal">ロータリー米山記念奨学金</text:p>
      <text:p text:style-name="Normal">ロームミュージックファンデーション</text:p>
      <text:p text:style-name="Normal">「埼玉発世界行き」奨学金　学位取得型</text:p>
      <text:p text:style-name="Normal">「埼玉発世界行き」奨学金　地域活躍コース</text:p>
      <text:p text:style-name="Normal">Santa Fe Institute Fellowship</text:p>
      <text:p text:style-name="Normal">SBC Summer School</text:p>
      <text:p text:style-name="Normal">SBW Berlin Scholarships</text:p>
      <text:p text:style-name="Normal">Schlumberger Foundation Faculty for the Future Fellowship for Women</text:p>
      <text:p text:style-name="Normal">Schwarzman Scholars Program</text:p>
      <text:soft-page-break/>
      <text:p text:style-name="Normal">SDGs岩佐賞</text:p>
      <text:p text:style-name="Normal">SDGｓジャパンスカラシップ岩佐賞</text:p>
      <text:p text:style-name="Normal">ＳＤＧｓ探求アワード</text:p>
      <text:p text:style-name="Normal">Silk Road School, Renmin University of China</text:p>
      <text:p text:style-name="Normal">SNU Global Scholarship</text:p>
      <text:p text:style-name="Normal">Sophies Live out Lound Award</text:p>
      <text:p text:style-name="Normal">Stamps Scholars Program</text:p>
      <text:p text:style-name="Normal">Stipendium Hungaricum<text:s/>ハンガリー政府奨学金</text:p>
      <text:p text:style-name="Normal">Study a Bachelors in the USA Scholarship</text:p>
      <text:p text:style-name="Normal">SYA School Year Abroad</text:p>
      <text:p text:style-name="Normal">サステナアワード</text:p>
      <text:p text:style-name="Normal">シン建工業真心奨学金</text:p>
      <text:p text:style-name="Normal">篠原欣子記念財団</text:p>
      <text:p text:style-name="Normal">スイス政府奨学金</text:p>
      <text:p text:style-name="Normal">スカンジナビア・ニッポンササカワ財団</text:p>
      <text:p text:style-name="Normal">スペイン政府奨学金</text:p>
      <text:p text:style-name="Normal">スラムダンク奨学金</text:p>
      <text:p text:style-name="Normal">スリランカ政府奨学金</text:p>
      <text:p text:style-name="Normal">スロバキア政府奨学金</text:p>
      <text:p text:style-name="Normal">スロベニア政府奨学金</text:p>
      <text:p text:style-name="Normal">セブン＆アイグローバル奨学金</text:p>
      <text:p text:style-name="Normal">佐賀県海外留学奨学金</text:p>
      <text:p text:style-name="Normal">佐藤陽国際奨学財団</text:p>
      <text:p text:style-name="Normal">坂口国際育英奨学財団</text:p>
      <text:soft-page-break/>
      <text:p text:style-name="Normal">埼玉県・オハイオ州スカラシップ</text:p>
      <text:p text:style-name="Normal">埼玉県戸田市海外留学奨学金</text:p>
      <text:p text:style-name="Normal">笹川平和財団</text:p>
      <text:p text:style-name="Normal">笹川保健財団ＳＡＳＡＫＡＷＡ看護フェロー</text:p>
      <text:p text:style-name="Normal">重田教育財団</text:p>
      <text:p text:style-name="Normal">秀桜基金留学賞</text:p>
      <text:p text:style-name="Normal">湘友会奨学財団</text:p>
      <text:p text:style-name="Normal">食生活研究会奨学金</text:p>
      <text:p text:style-name="Normal">新進芸術家の海外研修</text:p>
      <text:p text:style-name="Normal">世界聴覚障碍者リーダーシップ奨学基金プログラム</text:p>
      <text:p text:style-name="Normal">静岡県牧野スカラシップ奨学制度</text:p>
      <text:p text:style-name="Normal">孫正義育英財団</text:p>
      <text:p text:style-name="Normal">島財団海外留学奨学金</text:p>
      <text:p text:style-name="Normal">末延財団</text:p>
      <text:p text:style-name="Normal">鈴木万平糖尿病財団</text:p>
      <text:p text:style-name="Normal">Tazaki Foundation</text:p>
      <text:p text:style-name="Normal">Technical Fellowship UICC</text:p>
      <text:p text:style-name="Normal">The Actuarial Foundation</text:p>
      <text:p text:style-name="Normal">The Asia Foundation Women Scholarship</text:p>
      <text:p text:style-name="Normal">The Dorthy Marchus Sennsh Fellowship for Women</text:p>
      <text:p text:style-name="Normal">The Humboldt Association of Japan</text:p>
      <text:p text:style-name="Normal">The Maria Wallace Foundation – MSc. Fashion Buying and Management Scholarship</text:p>
      <text:p text:style-name="Normal">The Mitchell Scholarship</text:p>
      <text:p text:style-name="Normal">The Simons Foundation</text:p>
      <text:soft-page-break/>
      <text:p text:style-name="Normal">Tiger Master Excellence Scholarships</text:p>
      <text:p text:style-name="Normal">TOMODACHI Boeing Entrepreneurship Semminar</text:p>
      <text:p text:style-name="Normal">TOMODACHI Honda<text:s/>文化交流プログラム</text:p>
      <text:p text:style-name="Normal">TOMODACHIイノウエ・スカラーズプログラム</text:p>
      <text:p text:style-name="Normal">TOMODACHIデル。ノルテ高校陸前高田交流プログラム</text:p>
      <text:p text:style-name="Normal">TOMODACHIノースカロライナ国際交流基金プログラム</text:p>
      <text:p text:style-name="Normal">TOMODACHI住友商事奨学金プログラム</text:p>
      <text:p text:style-name="Normal">TOMODACHI春休みホームステイプログラム</text:p>
      <text:p text:style-name="Normal">TOMODACHI松江―ニューオリンズ交流プログラム</text:p>
      <text:p text:style-name="Normal">TOMODACHI―UNIQLOフェローシップ</text:p>
      <text:p text:style-name="Normal">TOMODACHI・MUFG国際交流プログラム</text:p>
      <text:p text:style-name="Normal">TOMODACHIアロハ・リーダーシッププログラム</text:p>
      <text:p text:style-name="Normal">TOMODACHIサマーコカ・コーラホームステイ研修プログラム</text:p>
      <text:p text:style-name="Normal">TOMODACHIサマー英語研修プログラム</text:p>
      <text:p text:style-name="Normal">TOMODACHIシアトルー福島草の根交流プログラム</text:p>
      <text:p text:style-name="Normal">TOMODACHIジャパンソサエティージュニア・フェロー学生交流プログラム</text:p>
      <text:p text:style-name="Normal">TOMODACHIセントルイス・石巻草の根交流プログラム</text:p>
      <text:p text:style-name="Normal">TOMODACHIテイラー・アンダーソン記念基金リサーチ交換プログラム</text:p>
      <text:p text:style-name="Normal">TOMODACHI津波救援プロジェクト</text:p>
      <text:p text:style-name="Normal">Tortuga Study Abroad Scholarship</text:p>
      <text:p text:style-name="Normal">TransLingo<text:s/>奨学金</text:p>
      <text:p text:style-name="Normal">TSMC国立雲林科技大学半導体日本人専門コース</text:p>
      <text:p text:style-name="Normal">タウ・スカラシップ</text:p>
      <text:soft-page-break/>
      <text:p text:style-name="Normal">チーブニング奨学金</text:p>
      <text:p text:style-name="Normal">チェコ政府奨学金</text:p>
      <text:p text:style-name="Normal">トビタテ！留学JAPAN　学部課程</text:p>
      <text:p text:style-name="Normal">トビタテ！留学JAPAN　高校生</text:p>
      <text:p text:style-name="Normal">トランス未来フォーラム</text:p>
      <text:p text:style-name="Normal">トルコSUCCESS奨学金</text:p>
      <text:p text:style-name="Normal">トルコ政府奨学金</text:p>
      <text:p text:style-name="Normal">華東教育文化財団</text:p>
      <text:p text:style-name="Normal">高丸宮様クイーンズ大学奨学金</text:p>
      <text:p text:style-name="Normal">高橋＆ハワット記念奨学金</text:p>
      <text:p text:style-name="Normal">高木仁三郎市民科学基金</text:p>
      <text:p text:style-name="Normal">寺浦さよこ記念奨学会</text:p>
      <text:p text:style-name="Normal">竹中育英会　海外大学院奨学金</text:p>
      <text:p text:style-name="Normal">中島記念国際交流財団</text:p>
      <text:p text:style-name="Normal">中南米における農業リーダー育成のための奨学金プログラム</text:p>
      <text:p text:style-name="Normal">東京都瑞穂町海外留学奨学金</text:p>
      <text:p text:style-name="Normal">東進海外留学進学制度</text:p>
      <text:p text:style-name="Normal">栃木県那須留学奨学金</text:p>
      <text:p text:style-name="Normal">武田振興科学財団</text:p>
      <text:p text:style-name="Normal">UM Brightlands Talent Scholarship</text:p>
      <text:p text:style-name="Normal">UNSESCO – L Oreal Fellowship for Women in Science</text:p>
      <text:p text:style-name="Normal">United World College</text:p>
      <text:p text:style-name="Normal">University of Illinois at Urbana-Champaign One Year for Undergraduate</text:p>
      <text:soft-page-break/>
      <text:p text:style-name="Normal">ウィンテック留学奨学金</text:p>
      <text:p text:style-name="Normal">内村鑑三スカラシップ</text:p>
      <text:p text:style-name="Normal">宇宙平和奨学金</text:p>
      <text:p text:style-name="Normal">浦上奨学会</text:p>
      <text:p text:style-name="Normal">浦和競馬チャレンジ奨学金　短期</text:p>
      <text:p text:style-name="Normal">浦和競馬チャレンジ奨学金　長期</text:p>
      <text:p text:style-name="Normal">上原記念生命科学財団</text:p>
      <text:p text:style-name="Normal">Vienna Bio Centre Summer School</text:p>
      <text:p text:style-name="Normal">WAプログラム</text:p>
      <text:p text:style-name="Normal">Wesleyan Freeman Asian Scholarship</text:p>
      <text:p text:style-name="Normal">Woodruff Foundation Program</text:p>
      <text:p text:style-name="Normal">World Bank Scholars Program日本・世界銀行共同大学院奨学金制度</text:p>
      <text:p text:style-name="Normal">ワールド寺子屋</text:p>
      <text:p text:style-name="Normal">渡邊利三国際奨学金</text:p>
      <text:p text:style-name="Normal">YAMAHA Music Foundation音楽支援事業</text:p>
      <text:p text:style-name="Normal">YouAreWelcomeHere Scholarship</text:p>
      <text:p text:style-name="Normal">Young Professional Fellowship</text:p>
      <text:p text:style-name="Normal">ヤマハ発動機スポーツ振興財団</text:p>
      <text:p text:style-name="Normal">ヨシノデンカユメツナグ奨学金</text:p>
      <text:p text:style-name="Normal">ヨネスクスポーツ振興財団ジュニア育成奨学生</text:p>
      <text:p text:style-name="Normal">山岡育英会</text:p>
      <text:p text:style-name="Normal">山田純一郎奨学財団</text:p>
      <text:p text:style-name="Normal">三重県四日市市科学教育奨学資金</text:p>
      <text:soft-page-break/>
      <text:p text:style-name="Normal">矢崎武夫記念大学院米国留学助成基金</text:p>
      <text:p text:style-name="Normal">柳井正財団</text:p>
      <text:p text:style-name="Normal">ZEN CLUB</text:p>
      <text:p text:style-name="Normal">Zlove Global Scholarship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Gothic" svg:font-family="Yu Gothic" style:font-family-generic="swiss" style:font-pitch="variable" svg:panose-1="2 11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Yu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Yu Gothic Light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Gothic Light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Yu Gothic Light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oshinao Ebisawa</meta:initial-creator>
    <dc:creator>Yoshinao Ebisawa</dc:creator>
    <meta:creation-date>2025-01-12T12:01:00Z</meta:creation-date>
    <dc:date>2025-01-20T08:27:00Z</dc:date>
    <meta:template xlink:href="Normal.dotm" xlink:type="simple"/>
    <meta:editing-cycles>10</meta:editing-cycles>
    <meta:editing-duration>PT9720S</meta:editing-duration>
    <meta:document-statistic meta:page-count="18" meta:paragraph-count="18" meta:word-count="1374" meta:character-count="9194" meta:row-count="65" meta:non-whitespace-character-count="7838"/>
  </office:meta>
</office:document-meta>
</file>