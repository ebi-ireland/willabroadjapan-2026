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ext-properties fo:color="#000000" style:font-name="Courier New" style:font-name-asian="Courier New" style:font-name-complex="Courier New" fo:font-size="14pt" style:font-size-asian="14pt" style:font-size-complex="14pt" style:font-family-generic="modern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middle" fo:wrap-option="wrap"/>
      <style:text-properties fo:color="#000000" style:font-name="Courier New" style:font-name-asian="Courier New" style:font-name-complex="Courier New" fo:font-size="14pt" style:font-size-asian="14pt" style:font-size-complex="14pt" style:font-family-generic="modern"/>
    </style:style>
    <style:style style:name="ce6" style:family="table-cell" style:parent-style-name="Default" style:data-style-name="N0">
      <style:text-properties style:font-name="Courier New" style:font-name-asian="Courier New" style:font-name-complex="Courier New" fo:font-size="14pt" style:font-size-asian="14pt" style:font-size-complex="14pt" style:font-family-generic="modern"/>
    </style:style>
    <style:style style:name="co1" style:family="table-column">
      <style:table-column-properties fo:break-before="auto" style:column-width="10.742083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0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37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number-columns-repeated="4" table:default-cell-style-name="ce2"/>
        <table:table-column table:style-name="co3" table:number-columns-repeated="16379" table:default-cell-style-name="ce4"/>
        <table:table-row table:style-name="ro1">
          <table:table-cell office:value-type="string" table:style-name="ce1">
            <text:p>大学名</text:p>
          </table:table-cell>
          <table:table-cell office:value-type="string" table:style-name="ce2">
            <text:p>全額</text:p>
          </table:table-cell>
          <table:table-cell office:value-type="string" table:style-name="ce2">
            <text:p>授業料</text:p>
            <text:p>100%免除</text:p>
          </table:table-cell>
          <table:table-cell office:value-type="string" table:style-name="ce2">
            <text:p>Need</text:p>
          </table:table-cell>
          <table:table-cell office:value-type="string" table:style-name="ce2">
            <text:p>授業料</text:p>
            <text:p>１００万円</text:p>
            <text:p>以下</text:p>
            <text:p>*奨学金付きあり</text:p>
          </table:table-cell>
          <table:table-cell office:value-type="string" table:style-name="ce2">
            <text:p>€ 7,000</text:p>
            <text:p>US$ 7,000</text:p>
            <text:p>£ 6,000</text:p>
            <text:p>CA$ 10,000</text:p>
            <text:p>AU$ 12,000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5">
            <text:p>Aalto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 table:style-name="ce4"/>
        </table:table-row>
        <table:table-row table:style-name="ro2">
          <table:table-cell office:value-type="string" table:style-name="ce5">
            <text:p>Abraham Baldwin Agricultural College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 table:style-name="ce4"/>
        </table:table-row>
        <table:table-row table:style-name="ro3">
          <table:table-cell office:value-type="string" table:style-name="ce5">
            <text:p>AGH University of Science and Technolog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5">
            <text:p>Agnes Scott College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 table:style-name="ce4"/>
        </table:table-row>
        <table:table-row table:style-name="ro2">
          <table:table-cell office:value-type="string" table:style-name="ce5">
            <text:p>Ajou University 亜洲大学校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 table:style-name="ce4"/>
        </table:table-row>
        <table:table-row table:style-name="ro2">
          <table:table-cell office:value-type="string" table:style-name="ce5">
            <text:p>Alabama A&amp;M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 table:style-name="ce4"/>
        </table:table-row>
        <table:table-row table:style-name="ro2">
          <table:table-cell office:value-type="string" table:style-name="ce5">
            <text:p>Albertus Magnus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 table:style-name="ce4"/>
        </table:table-row>
        <table:table-row table:style-name="ro2">
          <table:table-cell office:value-type="string" table:style-name="ce5">
            <text:p>Allegheny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 table:style-name="ce4"/>
        </table:table-row>
        <table:table-row table:style-name="ro2">
          <table:table-cell office:value-type="string" table:style-name="ce5">
            <text:p>American College Dubl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 table:style-name="ce4"/>
        </table:table-row>
        <table:table-row table:style-name="ro2">
          <table:table-cell office:value-type="string" table:style-name="ce5">
            <text:p>American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 table:style-name="ce4"/>
        </table:table-row>
        <table:table-row table:style-name="ro2">
          <table:table-cell office:value-type="string" table:style-name="ce5">
            <text:p>American University in Dubai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 table:style-name="ce4"/>
        </table:table-row>
        <table:table-row table:style-name="ro2">
          <table:table-cell office:value-type="string" table:style-name="ce5">
            <text:p>American University of Armenia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5">
            <text:p>American University of Phnom Penh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5">
            <text:p>American University of Sharjah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 table:style-name="ce4"/>
        </table:table-row>
        <table:table-row table:style-name="ro2">
          <table:table-cell office:value-type="string" table:style-name="ce5">
            <text:p>Amherst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 table:style-name="ce4"/>
        </table:table-row>
        <table:table-row table:style-name="ro2">
          <table:table-cell office:value-type="string" table:style-name="ce5">
            <text:p>Angelo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Arden University Berlin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Aristotle University of Thessaloniki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Arkansas Stat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Arkansas Tech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Art Academy of Latvia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Aschaffenburg University of Applied Scienc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Asia Pacific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Asia University 亞洲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Assumptio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Auburn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Augustana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Augusta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Austin Peay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Autonomous University of Madrid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Azerbaijan Technical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Azerbaijan Technological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Azusa Pacific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Babson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Baku Engineering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Bard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Bard College at Simon's Rock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Bard College Berlin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Barnard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Barry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Basilicata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Bates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Bay Path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Baylor University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string" table:style-name="ce5">
            <text:p>BBW Hochschule University of Applied Sciences</text:p>
          </table:table-cell>
          <table:table-cell table:number-columns-repeated="4" table:style-name="ce2"/>
          <table:table-cell table:number-columns-repeated="16379"/>
        </table:table-row>
        <table:table-row table:style-name="ro3">
          <table:table-cell office:value-type="string" table:style-name="ce5">
            <text:p>Beijing Language and Culture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Beloit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Benedictine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Bennington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Berea College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Berklee College of Musi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string" table:style-name="ce5">
            <text:p>Berlin International University of Applied Scienc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Bilkent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Bishops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Bismarck State College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Bluffto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Bluefield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Boise Stat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Bosto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Bowdoin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Boyce College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Brandeis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Briar Cliff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Bridgewater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Brigham Young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Brock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Brow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Bryn Mawr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Bucknell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alifornia Institute of Technolog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amero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Capital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3">
          <table:table-cell office:value-type="string" table:style-name="ce5">
            <text:p>Carinthia University of Applied Scienc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Carinthia University of Applied Sciences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arnegie Mellon University in Qata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Carthage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ase Western Reserv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atawba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Catholic University of Louvain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Cedar Crest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Cedarville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enter College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Central European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Central Michigan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Central State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Central Washingto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Chadron State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Charles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Chatham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Christendom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hung-Ang University 中央大学校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City University of Hong Kong 香港城市大学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Claremont McKenna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lark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lark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layton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Cleveland Institute of Music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oe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olby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ollege of Saint Benedict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ollege of the Atlantic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ollege of the the Holy Cross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olorado School of Mines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Columbia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Columbia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onnecticut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string" table:style-name="ce5">
            <text:p>Cooper Union for the Advancement of Science and Art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Copehagen Business School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3">
          <table:table-cell office:value-type="string" table:style-name="ce5">
            <text:p>Copehagen School of Design and Technolog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Coppin State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ornell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Cornell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ornish College of the Arts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Covenant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Cracow University of Economics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Curry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Curtis Institute of Music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string" table:style-name="ce5">
            <text:p>Czech University of Life Sciences Pragu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Dakota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Dankook University 檀国大学校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Danish Academy of Music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Darmstadt University of Applied Scienc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Dartmouth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Daugavpils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Davidson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Deep Springs College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Definance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Deggendorf Institute of Technolog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Delaware Stat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Delta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Deniso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DePaul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DePauw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DeSales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Dickinson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Dickinson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Dillard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Drexel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Dublin City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Duke University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Duke Kunshan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Duquesne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Earlham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East Central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East Tennessee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East Texas A&amp;M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East-West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Eastern Illinois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Eastern Kentucky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Eastern New Mexico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Easter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Eindhoven University of Technolog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Elizabethtown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Elmira Colleg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Emerson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Emory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ESADE Business School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Estonian Academy of Music and Theatr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Europa Universitat Flensburg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Europe Atlantic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number-rows-repeated="2" table:style-name="ro2">
          <table:table-cell office:value-type="string" table:style-name="ce5">
            <text:p>Ewha Womans University 梨花女子大学校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Fairmont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FH Aachen University of Applied Scienc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Fisk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Five Towns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Florida Agricultural and Mechanical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Florida A&amp;M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Florida Atlantic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Florida Gulf Coast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Florida International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Florida Polytechnic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Florida State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Fordham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Fort Hays Stat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Fort Valley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Framingham State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Francis Marion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Franklin &amp; Marshall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Free University of Brussels ULB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Free University of Brussels VUB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Freie Universitat Berlin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Frostburg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Fulda University of Applied Scienc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Funen Art Academ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Furman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Ganno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Gardner-Webb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Gavle University College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Gdansk University of Technolog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Georgia Southern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Georgia Southwestern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Georgetown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Georgetown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Georgetown University in Qatar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Gettysburg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Ghent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Goucher Colleg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Grambling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Greenvill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Grinnell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Grove City College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Guilford College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Gustavus Adolphus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string" table:style-name="ce5">
            <text:p>Gyeongsang National University 慶尚国立大学校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Hacettepe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Hamburg University of Technolog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Hamilton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Hampshire Colleg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Hanken School of Economic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Hankuk University of Foreign Studies 韓国外国語大学校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Hanover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Harvard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Harvey Mudd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Hasselt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Haverford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Hawaii Pacific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Heilbronn University of Applied Scienc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Heinrich Heine University Dusseldorf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Henderson Stat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Hendrix Colleg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High Point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Hilbert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Hillsdale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Hobart &amp; William Smith Colleges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Hochschule der Medien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Hochschule Fresenius University of Applied Scienc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Hochschule Furtwagen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Hochschule Geisenheim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Hof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Hohai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Hollins University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string" table:style-name="ce5">
            <text:p>Hong Kong Baptist University 香港浸会大学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Hongik University 弘益大学校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Hood College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Howard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Huntingdon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Idaho Stat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I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IED Barcelona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Illinois Institute of Technolog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Illinois Wesleya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Immaculata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Imperium International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Indiana Tech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Indiana University Bloomingto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Inha University 仁荷大学校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International Business School of Bulgaria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International Hellenic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Iowa State University of Science and Technolog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Istanbul Technical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Ithaca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Jackson State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Jacksonville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Jacksonvill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Jagiellonian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Jan Kochanowski University of Kielce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James Madison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Jili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Johannes Gutenberg University Mainz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John Brow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Johns Hopkins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Juniata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KAIST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Kalamazoo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Kangwon National University 江原大学校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Karlstad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Kaunas University of Technolog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Kennesaw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Kentucky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Kentucky Wesleyan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Kenyon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KIIT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Kingswood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Klaipeda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Knox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Koc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Kristianstad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KU Leuven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Kutztown University of Pennsylvania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Kuwantlen Polytechnic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Kyung Hee University 慶熙大学校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La Roch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Lafayette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Lake Forest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Lake Sperior State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Lamar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Lander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Langston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Latvia University of Agriculture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Lebanon Valley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Le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Lehigh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Leiden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Leipzig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Lenoir-Rhyn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Leuphana University Luneburg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Lewis &amp; Clark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Lewis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Liberty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Lindsey Wilson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Linnaeus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Lipscomb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Lithuanian Sports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Lithuanian University of Educational Scienc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Lithuanian University of Health Scienc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Lodz University of Technolog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Loras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Louisiana State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Louisiana Tech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Loyola Marymount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Loyola University Chicago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Loyola University Maryland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Lund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Luther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Lycoming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AHSA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asaryk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Maastricht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acalester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number-rows-repeated="2" table:style-name="ro2">
          <table:table-cell office:value-type="string" table:style-name="ce5">
            <text:p>Malardale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alon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anhattan School of Music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Marietta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arist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Mars Hill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arshall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Martin Luther University Halle-Wittenberg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Mary Baldwi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aryland Institute College of Art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aryville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aryville University of Saint Loui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arywood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assachusetts Institute of Technology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McMaster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cNeese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McPherson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Mendel University Brno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ercer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ercyhurst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eredith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ethodist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iami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ichigan Stat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ichigan Technological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iddle East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iddle Georgia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Middle Tennessee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Middlebury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Midland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Midway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idwestern State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Milliki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illsaps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ilwaukee Institute of Art and Desig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inerva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inneapolis College of Art and Desig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isericordia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ississippi University for Wome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ississippi Valley State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olloy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onmouth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ontana Stat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ontana Technological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ontreat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ontserrat College of Art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Morehead State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Mount Holyoke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Mount Saint Mary's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ount St. Joseph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Muhlenberg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Muskingum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Mykolas Romeris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Myongji University 明知大学校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Nanyang Technological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National and Kapodistrian University of Athen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ational Central University 中央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National Cheng Kung University 成功大学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National Chengchi University 政治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National Chi Nan University 曁南国際大学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National Chung Hsing University 中興大学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National Dong Hwa University 中興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National Kaohsiung University of Science and Technology 高雄科技大学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ational Taipei University 台北大学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National Taiwan Normal University 台湾師範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National Taiwan University 国立台湾大学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National Taiwan University of Science and Technology 台湾科技大学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ational Tsing Hua University 清華大学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National University of Singapor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National Yang Ming Chiao Tung University 陽明交通大学</text:p>
          </table:table-cell>
          <table:table-cell table:number-columns-repeated="4" table:style-name="ce2"/>
          <table:table-cell table:number-columns-repeated="16379"/>
        </table:table-row>
        <table:table-row table:style-name="ro3">
          <table:table-cell office:value-type="string" table:style-name="ce5">
            <text:p>National Yunlin University of Science and Technology 雲林科技大学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New Bulgarian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ew College of Florida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ew Mexico Highlands University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style-name="ce5">
            <text:p>New Saint Andrews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number-rows-repeated="2" table:style-name="ro2">
          <table:table-cell office:value-type="string" table:style-name="ce5">
            <text:p>New York Institute of Technolog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New York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New York University Abu Dhabi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ew York University Shanghai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ewma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Niagara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Nicholls State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rtheastern Illinois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Northeastern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Northern Kentuckey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Northern State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Northern Stat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rthland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rthwest College of Art &amp; Desig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Northwest Nazarene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Northwest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Northwestern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rthwestern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rthwestern University in Qatar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Oberlin Colleg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Occidental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Oglethorp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Ohio Dominica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Ohio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Ohio Wesleya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Oklahoma Panhandle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Oklahoma State University Institute of Technolog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Olin College of Enginnering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Ontario Tech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Ostbayerische Technische Hochschule Amberg-Weiden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Otis College of Art and Desig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Otterbei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Pace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Pacific Luthera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Pacific Union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Parsons School of Design at The New School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Parthenope University of Napl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Pennsylvania College of Art &amp; Desig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Pfeiffer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Pforzheim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Piedmont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Pittsburg Stat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Pittsburg State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Point Park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Polytechnic University of the Marches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Pomona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Pompeu Fabra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Poznan University of Life Scienc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Pratt Institute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Presbyterian College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President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Princeton University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Principia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Providence Colleg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Purdu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Pusan National University 釜山大学校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Qatar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Queens University of Charlott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Radboud University Nijmegen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Randolph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Randolph-Macon Colleg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RCSI &amp; UCD Malaysia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Reed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Regent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Reutlingen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Rhine-Waal University of Applied Scienc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number-rows-repeated="2" table:style-name="ro2">
          <table:table-cell office:value-type="string" table:style-name="ce5">
            <text:p>Rhode Island School of Design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Riga Technical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Riga Stradins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Ringling College of Art and Design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style-name="ce5">
            <text:p>Ripon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Rivier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Roberts Wesleya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Rochester Christia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Rochester Institute of Technolog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Rockhurst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Roger Williams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Rollins College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Rosemont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Rosenheim Technical University of Applied Scienc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Royal College of Art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Royal College of Musi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number-rows-repeated="2" table:style-name="ro2">
          <table:table-cell office:value-type="string" table:style-name="ce5">
            <text:p>Saginaw Valley Stat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aint Anselm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Saint John's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Saint Joseph's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aint Martin's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aint Michael's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aint Vincent Colleg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alem College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Samford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San Francisco Conservatory of Music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Santa Clara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arah Lawrence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Savannah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Schmalkalden University of Applied Scienc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School of the Art Institute of Chicago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cripps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ebeelas Maret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Seoul National University ソウル大学校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eton Hill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hawnee Stat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hih Hsin University 世新大学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horter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iena Heights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immons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iena Heights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Singapore University of Social Sciences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Singapore University of Technology and Desig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kidmore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mith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odertor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ofia University Bulgaria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Sogang University 西江大学校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South Westphalia University of Applied Scienc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Southeastern Louisiana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Southeastern Oklahoma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Southern California Institute of Architectur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outhern Methodist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outhern Nazaren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outhern New Hampshir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Southwestern Oklahoma Stat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outhwestern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Spelman Colleg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Springfield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St. Andrews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t. Edward's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St. Francis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t. John's College, Annapolis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t. John's College, Santa F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t. Lawrence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t. Norbert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t. Olaf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tanford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tanford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tephens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tetson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tevens Institute of Technolog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tockholm University of the Arts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tonehill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uffolk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ungkyunkwan University 成均館大学校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unway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warthmore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Swedish University of Agricultural Sciences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Sweet Briar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Syracus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Tabor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Taejae University テジェ大学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allinn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allinn University of Technolog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amkang University 淡江大学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amper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Technical University of Applied Sciences Wurzburg-Schweinfurt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echnical University of Liberec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echnical University of Munich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echnische Hochschule Ingolstadt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echnische Hochschule Ingolstadt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emple University Japa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ennessee Wesleya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exas A&amp;M International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exas A&amp;M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Texas Christia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Texas Southern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exas Tech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he Catholic University of America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he College of Saint Ros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he College of Wooster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The Colorado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string" table:style-name="ce5">
            <text:p>The Education University of Hong Kong 香港教育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he George Washingto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The Hong Kong Polytechnic University 香港理工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The Hong Kong University of Science and Technology 香港科技大学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he Juilliard School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The Royal Academy of Music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he University of Alabama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he University of Economics Pragu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The University of North Carolina at Chapell Hill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3">
          <table:table-cell office:value-type="string" table:style-name="ce5">
            <text:p>The University of North Carolina at Charlotte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3">
          <table:table-cell office:value-type="string" table:style-name="ce5">
            <text:p>The University of North Carolina at Pembroke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he University of Olivet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The University of Ostrava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he University of Pardubice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he University of the South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Thomas Edison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homas Aquinas College - California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Thomas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Thomas Mor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hrac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omas Bata University in Zlin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on Duc Thang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on Duc Thang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revecca Nazaren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rier University of Applied Scienc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rine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rinity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Trinity College Dubl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Trinity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Tufts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Tulane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Tunghai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usculum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3">
          <table:table-cell office:value-type="string" table:style-name="ce5">
            <text:p>UNIST Ulsan National Institute of Technology 蔚山科学技術院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mea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on College - New York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United Arab Emirates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at Bremen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at der Saarland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at Tubinge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College Dubl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College Londo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University College of Enterprise and Administration in Lublin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for Foreigners Perugia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Agriculture in Krakow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Alberta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Antwerp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University of Applied Sciences Northwestern Switzerland FHNW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Arkansas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University of Arkansas at Fort Smith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University of Arkansas at Little Rock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University of Arkansas at Monticello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University of Arkansas at Pine Bluff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Arkansas Fayetteville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Arkansas Grantham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Bahrain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Basel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Bayreuth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Bern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Bologna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Cagliari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Camerino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University of Campania Luigi Vanvitelli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Calgar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Calgar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California, Berkele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Central Arkansas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Central Missouri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Central Oklahoma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Chicago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Cincinnati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Cologne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Connecticut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Copenhage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Crete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Debrece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Dubai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Eastern Finland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University of Europe for applied Sciences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Florida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Forestr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Freiburg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Fribourg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Gastronomic Science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Gdansk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Geneva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Genoa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Georgia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Gothenburg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Guelph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Hartford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University of Health Sciences and Pharmacy in St. Louis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Houston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Indianapolis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Illinois Springfield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University of International Studies of Rom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Klagenfurt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Kentuck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Latvia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Lausanne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Liege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Life Sciences in Lublin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Lucerne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Lucern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Macedonia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University of Maryland, Baltimore Coun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Maryland College Park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Massachusetts Dartmouth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Melbourn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Messina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Miami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Michigan-Flint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Milla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Minnesota Twin Cities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Mississippi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Missouri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3">
          <table:table-cell office:value-type="string" table:style-name="ce5">
            <text:p>University of Modena and Reggio Emilia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Mon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Montevallo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Namur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Nebraska at Kearne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Nebraska at Lincol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Neuchatel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New Mexic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New Orlean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North Florida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North Texa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Notre Dame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Oklahoma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Oregon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Oulu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Padua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Palerm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Pennsylvania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Perugia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Pisa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Pittsburg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Puget Sound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Rhode Island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Richmond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Rochester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Saint Francis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Sanmarino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University of Science and Arts of Oklahoma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South Carolina<text:s/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South Carolina Beaufort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South Dakota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South Florida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Southern California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number-rows-repeated="3" table:style-name="ro2">
          <table:table-cell office:value-type="string" table:style-name="ce5">
            <text:p>University of South Denmark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St. Galle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Sydne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Tartu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Technology Sydne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Texas at El Paso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Texas at Tyler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Thessaly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Tronto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Tronto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Tulsa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Turku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Turt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Twent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Warsaw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Warwick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Waterloo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West Attica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West Florida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Western Macedonia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Wisconsin Madison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Wisconsin Platteville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Wisconsin River Falls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University of Wroclaw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iversity of Zurich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UBI Business School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Valdosta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Vanderbilt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VanderCook College of Music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Varna Fre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Vassar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Villanova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string" table:style-name="ce5">
            <text:p>Vilnius Gediminas Technical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Vilnius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Vi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Virginia State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Virginia Tech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Virginia Wesleya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Vrije Universiteit Amsterdam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Vytautas Magnus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Wake Forest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Walsh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Warren Willson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Warsaw University of Technolog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Wartburg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Washington and Lee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Washington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Washington University in St. Louis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Wayland Baptist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Website der OTH Regensburg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Webster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Wellesley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Wesleyan Colleg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Wesleyan University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West Virginia Wesleyan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Western Illinois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3">
          <table:table-cell office:value-type="string" table:style-name="ce5">
            <text:p>Westminster College - Fulton / New Wilmingto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West Texas A&amp;M Universit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Westminster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Whitman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Whitworth University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Willamette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Willamette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William Jewell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William Baptist University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William Woods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Williams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Wilmington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Wilson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Winston-Salem State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Wofford Colleg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Worcester Polytechnic Institut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Worms University of Applied Science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Wroclaw University of Science and Technology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WU Vienna University of Economics and Business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Wyoming Catholic Colleg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Yale University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Yeungnam University 嶺南大学校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number-rows-repeated="2" table:style-name="ro2">
          <table:table-cell office:value-type="string" table:style-name="ce5">
            <text:p>Yonsei University 延世大学校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Youngstown State University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3">
            <text:p>愛知東邦大学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愛知文教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青森中央学院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育英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石巻専修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宇都宮共和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エリザベト音楽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奥羽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大阪河﨑リハビリテーション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大阪芸術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大阪工業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大阪体育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大手前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沖縄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学習院女子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神奈川大学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関西福祉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関西福祉科学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関東学院大学　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関東学園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岐阜保健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九州共立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九州産業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九州女子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九州ルーテル学院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京都医療科学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京都先端科学大学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神戸松蔭女子学院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神戸女学院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神戸薬科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国際医療福祉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国際基督教大学　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国士舘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埼玉工業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札幌大谷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札幌学院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三育学院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四国学院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静岡英和学院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静岡産業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静岡福祉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純真学園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昭和音楽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成城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聖泉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専修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園田学園女子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3">
            <text:p>高崎健康福祉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3">
            <text:p>中部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3">
            <text:p>鎮西学院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3">
            <text:p>帝京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3">
            <text:p>帝京平成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3">
            <text:p>東海学園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3">
            <text:p>東京工科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3">
            <text:p>東京国際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3">
            <text:p>東京成徳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3">
            <text:p>東京富士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3">
            <text:p>常葉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3">
            <text:p>鳥取看護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3">
            <text:p>豊田工業大学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長岡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3">
            <text:p>長野保健医療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3">
            <text:p>長野保健医療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新潟経営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西九州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西日本工業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二松學舍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日本工業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日本国際学園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日本体育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人間環境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函館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羽衣国際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姫路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弘前医療福祉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弘前学院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広島都市学園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福岡工業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福岡国際医療福祉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別府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北海道科学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身延山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宮崎国際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ものつくり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横浜商科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横浜薬科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和洋女子大学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number-rows-repeated="104768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324</meta:generator>
    <meta:initial-creator>Yoshinao Ebisawa</meta:initial-creator>
    <dc:creator>Yoshinao Ebisawa</dc:creator>
    <meta:creation-date>2025-01-12T13:26:55Z</meta:creation-date>
    <dc:date>2025-01-12T16:48:26Z</dc:date>
  </office:meta>
</office:document-meta>
</file>